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end" style:justify-single-word="false" style:writing-mode="rl-tb"/>
      <style:text-properties officeooo:paragraph-rsid="00125eed"/>
    </style:style>
    <style:style style:name="P2" style:family="paragraph" style:parent-style-name="Standard" style:list-style-name="L2">
      <style:paragraph-properties fo:text-align="end" style:justify-single-word="false" style:writing-mode="rl-tb"/>
      <style:text-properties officeooo:paragraph-rsid="00125eed"/>
    </style:style>
    <style:style style:name="P3" style:family="paragraph" style:parent-style-name="Standard">
      <style:paragraph-properties fo:text-align="center" style:justify-single-word="false" style:writing-mode="rl-tb"/>
    </style:style>
    <style:style style:name="P4" style:family="paragraph" style:parent-style-name="Standard">
      <style:paragraph-properties fo:text-align="end" style:justify-single-word="false" style:writing-mode="rl-tb"/>
      <style:text-properties officeooo:rsid="00125eed" officeooo:paragraph-rsid="00125eed"/>
    </style:style>
    <style:style style:name="P5" style:family="paragraph" style:parent-style-name="Text_20_body" style:list-style-name="L2">
      <style:paragraph-properties fo:text-align="end" style:justify-single-word="false" style:writing-mode="rl-tb"/>
      <style:text-properties officeooo:paragraph-rsid="0012eb01"/>
    </style:style>
    <style:style style:name="P6" style:family="paragraph" style:parent-style-name="Text_20_body" style:list-style-name="L2">
      <style:paragraph-properties fo:text-align="end" style:justify-single-word="false" style:writing-mode="rl-tb"/>
      <style:text-properties officeooo:rsid="0012eb01" officeooo:paragraph-rsid="0012eb01"/>
    </style:style>
    <style:style style:name="T1" style:family="text">
      <style:text-properties officeooo:rsid="00125eed"/>
    </style:style>
    <style:style style:name="T2" style:family="text">
      <style:text-properties officeooo:rsid="0012eb01"/>
    </style:style>
    <style:style style:name="T3" style:family="text">
      <style:text-properties officeooo:rsid="0013d9a8"/>
    </style:style>
    <text:list-style style:name="L1">
      <text:list-level-style-number text:level="1" text:style-name="Numbering_20_Symbols" loext:num-list-format="%1%)" style:num-suffix=")" style:num-format="A">
        <style:list-level-properties text:list-level-position-and-space-mode="label-alignment" fo:text-align="end">
          <style:list-level-label-alignment text:label-followed-by="listtab" text:list-tab-stop-position="0.5429in" fo:text-indent="-0.25in" fo:margin-left="0.5429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929in" fo:text-indent="-0.25in" fo:margin-left="0.7929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0429in" fo:text-indent="-0.25in" fo:margin-left="1.0429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929in" fo:text-indent="-0.25in" fo:margin-left="1.2929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429in" fo:text-indent="-0.25in" fo:margin-left="1.5429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929in" fo:text-indent="-0.25in" fo:margin-left="1.7929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0429in" fo:text-indent="-0.25in" fo:margin-left="2.0429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929in" fo:text-indent="-0.25in" fo:margin-left="2.2929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429in" fo:text-indent="-0.25in" fo:margin-left="2.5429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929in" fo:text-indent="-0.25in" fo:margin-left="2.7929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תכנון מערך שיעור – מודול <text:span text:style-name="T1">CI CD</text:span></text:p>
      <text:p text:style-name="P4">1. פתיחת המודול</text:p>
      <text:list text:style-name="L1">
        <text:list-item>
          <text:p text:style-name="P1"><text:span text:style-name="T1">על בסיס מצגת 8.1, הבנת התהליך של בניי תהאפליקציה שמתשנה ורת כלז הזמן וחייבים שכל השיבים יהיו אוטומטיים בלי תלות בבני אדם, שרת שיריץ את הבדיקות, שידע לשלוף ולהחזיק סיסמאות, שיבצע בנייה של קוד ויצירת של תמונות דוקר ולבסוף גם שיבצע את הדחיפה לענן בלי צורך בתהערבות אנשוית – הכל אוטומטי על מנת לחסוך בכאב ראש, כלומר הדבאופס צריך לדאוג שלא יהיה יותר צורך בדבאופס (בהיבט מסויים)</text:span></text:p>
        </text:list-item>
      </text:list>
      <text:p text:style-name="P4"/>
      <text:p text:style-name="P4">2. חלק ראשון – היכרות עם GH ACTIONS</text:p>
      <text:list text:style-name="L2">
        <text:list-item>
          <text:p text:style-name="P2"><text:span text:style-name="T1">הבנה של ייעוד הפלטפורמה, אוטומציה, טסטים, בילדים, ודיפלויימנט, והרצת תהלכיים ספציפיים למטרות ספציפיות </text:span><text:span text:style-name="T2">כגון:</text:span></text:p>
          <text:list>
            <text:list-item>
              <text:p text:style-name="P5"><text:span text:style-name="Strong_20_Emphasis">Tests Workflow</text:span> — מופעל כאשר מפתח פותח או מעדכן Pull Request. הוא מריץ אוטומטית טסטים ובדיקות כדי למנוע מקוד שבור או באגים להגיע ל־main branch.</text:p>
            </text:list-item>
            <text:list-item>
              <text:p text:style-name="P5"><text:span text:style-name="Strong_20_Emphasis">Build Workflow</text:span> — מופעל כאשר מתבצע Push ל־branches כמו <text:span text:style-name="Source_20_Text">develop</text:span> או <text:span text:style-name="Source_20_Text">main</text:span>. הוא בונה את האפליקציה ויוצר artifacts כמו Docker images כדי לוודא שהמערכת נבנית ועובדת בצורה תקינה לפני deployment.</text:p>
            </text:list-item>
            <text:list-item>
              <text:p text:style-name="P5"><text:span text:style-name="Strong_20_Emphasis">Deploy Workflow</text:span> — מופעל לאחר Merge או Push מוצלח ל־<text:span text:style-name="Source_20_Text">main</text:span> branch. הוא מבצע deployment אוטומטי ל־Staging או Production כדי לחסוך עבודה ידנית ולאפשר שחרורים מהירים ועקביים יותר.</text:p>
            </text:list-item>
            <text:list-item>
              <text:p text:style-name="P5"><text:span text:style-name="Strong_20_Emphasis">Scheduled Workflow</text:span> — מופעל בזמנים קבועים באמצעות Cron Schedule, למשל כל לילה ב־02:00. הוא משמש למשימות תחזוקה אוטומטיות כמו גיבויים, ניקוי logs, או סריקות אבטחה שצריכות לרוץ באופן קבוע ללא התערבות אנושית.</text:p>
            </text:list-item>
          </text:list>
        </text:list-item>
        <text:list-item>
          <text:p text:style-name="P6">לציין יעילות של הדברים כמו אוטומיציהף חסכון בזמן וה=פחת טעויות אנוש, ניהול אחיד במקום אח, תמיכה מלאה בענן, ואינטגרציה לכל אירוע שיכול להיות בgithub</text:p>
        </text:list-item>
        <text:list-item>
          <text:p text:style-name="P6">הבנת המודל של תהליך בגיטהב + ההירכיה הבסיסית בלי להעמיק אלא לתת תמונה היי-לבלב</text:p>
        </text:list-item>
        <text:list-item>
          <text:p text:style-name="P6">איזכור נושא העלויות בקצרה בלי להעמיק</text:p>
        </text:list-item>
        <text:list-item>
          <text:p text:style-name="P6">יצירת ריפו בממשק של גיטהב + יצירת וורקפלואו בסיס בלי IDE </text:p>
        </text:list-item>
        <text:list-item>
          <text:p text:style-name="P6">ביצוע CLONE וצפייה בקובץ גם בIDE כקובץ לכל דבר ועניים</text:p>
        </text:list-item>
        <text:list-item>
          <text:p text:style-name="P6">מעבר והדגמה על פרוייקט <text:span text:style-name="T3">React + יצירת עותק אצל התלמידים</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4T21:14:58.838399603</meta:creation-date>
    <dc:date>2026-05-14T22:08:13.368187919</dc:date>
    <meta:editing-duration>PT28M16S</meta:editing-duration>
    <meta:editing-cycles>1</meta:editing-cycles>
    <meta:document-statistic meta:table-count="0" meta:image-count="0" meta:object-count="0" meta:page-count="1" meta:paragraph-count="15" meta:word-count="293" meta:character-count="1713" meta:non-whitespace-character-count="1439"/>
    <meta:generator>LibreOffice/24.2.7.2$Linux_X86_64 LibreOffice_project/420$Build-2</meta:generator>
  </office:meta>
</office:document-meta>
</file>