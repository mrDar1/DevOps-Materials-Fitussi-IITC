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Aptos Narrow" svg:font-family="Aptos Narrow"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12LVL2" style:num-suffix="." style:num-list-format-name="NLF2"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3"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3"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3"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3"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3"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3"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text-properties style:font-name="Aptos Narrow" fo:font-weight="bold" style:font-weight-asian="bold" style:font-weight-complex="bold" style:language-complex="he" style:country-complex="IL"/>
    </style:style>
    <style:style style:name="P4" style:parent-style-name="Textbody" style:list-style-name="LFO1" style:family="paragraph">
      <style:text-properties style:font-name="Aptos Narrow" style:language-complex="he" style:country-complex="IL"/>
    </style:style>
    <style:style style:name="P5" style:parent-style-name="Textbody" style:list-style-name="LFO1" style:family="paragraph">
      <style:text-properties style:font-name="Aptos Narrow" style:language-complex="he" style:country-complex="IL"/>
    </style:style>
    <style:style style:name="P6" style:parent-style-name="Textbody" style:list-style-name="LFO1" style:family="paragraph">
      <style:text-properties style:font-name="Aptos Narrow" style:language-complex="he" style:country-complex="IL"/>
    </style:style>
    <style:style style:name="P7" style:parent-style-name="Textbody" style:list-style-name="LFO1" style:family="paragraph">
      <style:text-properties style:font-name="Aptos Narrow" style:language-complex="he" style:country-complex="IL"/>
    </style:style>
    <style:style style:name="P8" style:parent-style-name="Textbody" style:list-style-name="LFO1" style:family="paragraph">
      <style:text-properties style:font-name="Aptos Narrow" style:language-complex="he" style:country-complex="IL"/>
    </style:style>
    <style:style style:name="P9" style:parent-style-name="Textbody" style:list-style-name="LFO1" style:family="paragraph">
      <style:text-properties style:font-name="Aptos Narrow" style:language-complex="he" style:country-complex="IL"/>
    </style:style>
    <style:style style:name="P10" style:parent-style-name="Textbody" style:list-style-name="LFO1" style:family="paragraph">
      <style:text-properties style:font-name="Aptos Narrow" style:language-complex="he" style:country-complex="IL"/>
    </style:style>
    <style:style style:name="P11" style:parent-style-name="Textbody" style:list-style-name="LFO1" style:family="paragraph">
      <style:text-properties style:font-name="Aptos Narrow" style:language-complex="he" style:country-complex="IL"/>
    </style:style>
    <style:style style:name="P12" style:parent-style-name="Textbody" style:list-style-name="LFO1" style:family="paragraph">
      <style:text-properties style:font-name="Aptos Narrow" style:language-complex="he" style:country-complex="IL"/>
    </style:style>
    <style:style style:name="P13" style:parent-style-name="Textbody" style:list-style-name="LFO1" style:family="paragraph">
      <style:text-properties style:font-name="Aptos Narrow" style:language-complex="he" style:country-complex="IL"/>
    </style:style>
    <style:style style:name="P14" style:parent-style-name="Textbody" style:list-style-name="LFO1" style:family="paragraph">
      <style:text-properties style:font-name="Aptos Narrow" style:language-complex="he" style:country-complex="IL"/>
    </style:style>
    <style:style style:name="P15" style:parent-style-name="Normal" style:family="paragraph">
      <style:paragraph-properties fo:break-before="page" style:writing-mode="lr-tb"/>
      <style:text-properties style:font-name="Aptos Narrow" style:language-complex="he" style:country-complex="IL"/>
    </style:style>
    <style:style style:name="P16" style:parent-style-name="Textbody" style:family="paragraph">
      <style:paragraph-properties fo:text-align="center"/>
      <style:text-properties style:font-name="Aptos Narrow" fo:font-weight="bold" style:font-weight-asian="bold" style:font-weight-complex="bold" fo:font-size="72pt" style:font-size-asian="72pt" style:font-size-complex="72pt" style:language-complex="he" style:country-complex="IL"/>
    </style:style>
    <style:style style:name="P17" style:parent-style-name="Textbody" style:family="paragraph">
      <style:paragraph-properties fo:text-align="center"/>
      <style:text-properties style:font-name="Aptos Narrow" fo:font-weight="bold" style:font-weight-asian="bold" style:font-weight-complex="bold" fo:font-size="72pt" style:font-size-asian="72pt" style:font-size-complex="72pt" style:language-complex="he" style:country-complex="IL"/>
    </style:style>
    <style:style style:name="P18" style:parent-style-name="Normal" style:family="paragraph">
      <style:paragraph-properties fo:break-before="page" style:writing-mode="lr-tb"/>
      <style:text-properties style:font-name="Aptos Narrow" fo:font-weight="bold" style:font-weight-asian="bold" style:font-weight-complex="bold" fo:font-size="72pt" style:font-size-asian="72pt" style:font-size-complex="72pt" style:language-complex="he" style:country-complex="IL"/>
    </style:style>
    <style:style style:name="P19" style:parent-style-name="Textbody" style:list-style-name="LFO23" style:family="paragraph">
      <style:text-properties style:font-name="Aptos Narrow" fo:font-weight="bold" style:font-weight-asian="bold" style:font-weight-complex="bold" style:language-complex="he" style:country-complex="IL"/>
    </style:style>
    <style:style style:name="P20" style:parent-style-name="Textbody" style:family="paragraph">
      <style:paragraph-properties fo:margin-left="0.25in">
        <style:tab-stops/>
      </style:paragraph-properties>
      <style:text-properties style:font-name="Aptos Narrow" style:language-complex="he" style:country-complex="IL"/>
    </style:style>
    <style:style style:name="P21" style:parent-style-name="Textbody" style:family="paragraph">
      <style:paragraph-properties fo:margin-left="0.25in">
        <style:tab-stops/>
      </style:paragraph-properties>
      <style:text-properties style:font-name="Aptos Narrow" style:language-complex="he" style:country-complex="IL"/>
    </style:style>
    <style:style style:name="P22"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3"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4"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5"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6"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7"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8" style:parent-style-name="Textbody" style:list-style-name="LFO2"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29" style:parent-style-name="Textbody" style:family="paragraph">
      <style:paragraph-properties fo:margin-left="0.25in">
        <style:tab-stops/>
      </style:paragraph-properties>
      <style:text-properties style:font-name="Aptos Narrow" style:language-complex="he" style:country-complex="IL"/>
    </style:style>
    <style:style style:name="T30" style:parent-style-name="DefaultParagraphFont" style:family="text">
      <style:text-properties style:font-name="Aptos Narrow" style:language-complex="he" style:country-complex="IL"/>
    </style:style>
    <style:style style:name="P31" style:parent-style-name="Textbody" style:list-style-name="LFO23" style:family="paragraph">
      <style:text-properties style:font-name="Aptos Narrow" fo:font-weight="bold" style:font-weight-asian="bold" style:font-weight-complex="bold" style:language-complex="he" style:country-complex="IL"/>
    </style:style>
    <style:style style:name="P32" style:parent-style-name="Textbody" style:family="paragraph">
      <style:paragraph-properties fo:margin-left="0.25in">
        <style:tab-stops/>
      </style:paragraph-properties>
      <style:text-properties style:font-name="Aptos Narrow" style:language-complex="he" style:country-complex="IL"/>
    </style:style>
    <style:style style:name="P33" style:parent-style-name="Textbody" style:family="paragraph">
      <style:paragraph-properties fo:margin-left="0.25in">
        <style:tab-stops/>
      </style:paragraph-properties>
      <style:text-properties style:font-name="Aptos Narrow" style:language-complex="he" style:country-complex="IL"/>
    </style:style>
    <style:style style:name="P34" style:parent-style-name="Textbody" style:list-style-name="LFO3"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35" style:parent-style-name="Textbody" style:list-style-name="LFO3"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36" style:parent-style-name="Textbody" style:list-style-name="LFO3"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37" style:parent-style-name="Textbody" style:list-style-name="LFO3"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38" style:parent-style-name="Textbody" style:list-style-name="LFO3"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39" style:parent-style-name="Textbody" style:list-style-name="LFO3"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40" style:parent-style-name="Textbody" style:family="paragraph">
      <style:paragraph-properties fo:margin-left="0.25in">
        <style:tab-stops/>
      </style:paragraph-properties>
      <style:text-properties style:font-name="Aptos Narrow" style:language-complex="he" style:country-complex="IL"/>
    </style:style>
    <style:style style:name="P41" style:parent-style-name="Textbody" style:family="paragraph">
      <style:paragraph-properties fo:margin-left="0.25in">
        <style:tab-stops/>
      </style:paragraph-properties>
      <style:text-properties style:font-name="Aptos Narrow" style:language-complex="he" style:country-complex="IL"/>
    </style:style>
    <style:style style:name="P42" style:parent-style-name="Textbody" style:family="paragraph">
      <style:paragraph-properties fo:margin-left="0.25in">
        <style:tab-stops/>
      </style:paragraph-properties>
      <style:text-properties style:font-name="Aptos Narrow" style:language-complex="he" style:country-complex="IL"/>
    </style:style>
    <style:style style:name="P43" style:parent-style-name="Textbody" style:list-style-name="LFO4"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44" style:parent-style-name="Textbody" style:list-style-name="LFO4"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45" style:parent-style-name="Textbody" style:list-style-name="LFO4"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46" style:parent-style-name="Textbody" style:list-style-name="LFO4"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T47" style:parent-style-name="DefaultParagraphFont" style:family="text">
      <style:text-properties style:font-name="Aptos Narrow" style:language-complex="he" style:country-complex="IL"/>
    </style:style>
    <style:style style:name="P48" style:parent-style-name="Textbody" style:list-style-name="LFO23" style:family="paragraph">
      <style:text-properties style:font-name="Aptos Narrow" fo:font-weight="bold" style:font-weight-asian="bold" style:font-weight-complex="bold" style:language-complex="he" style:country-complex="IL"/>
    </style:style>
    <style:style style:name="P49" style:parent-style-name="Textbody" style:family="paragraph">
      <style:paragraph-properties fo:margin-left="0.25in">
        <style:tab-stops/>
      </style:paragraph-properties>
      <style:text-properties style:font-name="Aptos Narrow" style:language-complex="he" style:country-complex="IL"/>
    </style:style>
    <style:style style:name="P50" style:parent-style-name="Textbody" style:family="paragraph">
      <style:paragraph-properties fo:margin-left="0.25in">
        <style:tab-stops/>
      </style:paragraph-properties>
      <style:text-properties style:font-name="Aptos Narrow" style:language-complex="he" style:country-complex="IL"/>
    </style:style>
    <style:style style:name="P51" style:parent-style-name="Textbody" style:list-style-name="LFO5"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52" style:parent-style-name="Textbody" style:list-style-name="LFO5"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53" style:parent-style-name="Textbody" style:list-style-name="LFO5"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54" style:parent-style-name="Textbody" style:list-style-name="LFO5"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55" style:parent-style-name="Textbody" style:list-style-name="LFO5"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56" style:parent-style-name="Textbody" style:family="paragraph">
      <style:paragraph-properties fo:margin-left="0.25in">
        <style:tab-stops/>
      </style:paragraph-properties>
      <style:text-properties style:font-name="Aptos Narrow" style:language-complex="he" style:country-complex="IL"/>
    </style:style>
    <style:style style:name="T57" style:parent-style-name="DefaultParagraphFont" style:family="text">
      <style:text-properties style:font-name="Aptos Narrow" style:language-complex="he" style:country-complex="IL"/>
    </style:style>
    <style:style style:name="P58" style:parent-style-name="Textbody" style:list-style-name="LFO23" style:family="paragraph"/>
    <style:style style:name="T59" style:parent-style-name="DefaultParagraphFont" style:family="text">
      <style:text-properties style:font-name="Aptos Narrow" fo:font-weight="bold" style:font-weight-asian="bold" style:font-weight-complex="bold" style:language-complex="he" style:country-complex="IL"/>
    </style:style>
    <style:style style:name="P60" style:parent-style-name="Textbody" style:family="paragraph">
      <style:paragraph-properties fo:margin-left="0.25in">
        <style:tab-stops/>
      </style:paragraph-properties>
      <style:text-properties style:font-name="Aptos Narrow" style:language-complex="he" style:country-complex="IL"/>
    </style:style>
    <style:style style:name="P61" style:parent-style-name="Textbody" style:family="paragraph">
      <style:paragraph-properties fo:margin-left="0.25in">
        <style:tab-stops/>
      </style:paragraph-properties>
      <style:text-properties style:font-name="Aptos Narrow" style:language-complex="he" style:country-complex="IL"/>
    </style:style>
    <style:style style:name="P62" style:parent-style-name="Textbody" style:family="paragraph">
      <style:paragraph-properties fo:margin-left="0.25in">
        <style:tab-stops/>
      </style:paragraph-properties>
      <style:text-properties style:font-name="Aptos Narrow" style:language-complex="he" style:country-complex="IL"/>
    </style:style>
    <style:style style:name="P63" style:parent-style-name="Textbody" style:list-style-name="LFO6"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64" style:parent-style-name="Textbody" style:list-style-name="LFO6"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65" style:parent-style-name="Textbody" style:list-style-name="LFO6"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66" style:parent-style-name="Textbody" style:list-style-name="LFO6"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67" style:parent-style-name="Textbody" style:list-style-name="LFO6"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68" style:parent-style-name="Textbody" style:family="paragraph">
      <style:paragraph-properties fo:margin-left="0.25in">
        <style:tab-stops/>
      </style:paragraph-properties>
      <style:text-properties style:font-name="Aptos Narrow" style:language-complex="he" style:country-complex="IL"/>
    </style:style>
    <style:style style:name="T69" style:parent-style-name="DefaultParagraphFont" style:family="text">
      <style:text-properties style:font-name="Aptos Narrow" style:language-complex="he" style:country-complex="IL"/>
    </style:style>
    <style:style style:name="P70" style:parent-style-name="Textbody" style:list-style-name="LFO23" style:family="paragraph">
      <style:text-properties style:font-name="Aptos Narrow" fo:font-weight="bold" style:font-weight-asian="bold" style:font-weight-complex="bold" style:language-complex="he" style:country-complex="IL"/>
    </style:style>
    <style:style style:name="P71" style:parent-style-name="Textbody" style:family="paragraph">
      <style:paragraph-properties fo:margin-left="0.25in">
        <style:tab-stops/>
      </style:paragraph-properties>
      <style:text-properties style:font-name="Aptos Narrow" style:language-complex="he" style:country-complex="IL"/>
    </style:style>
    <style:style style:name="P72" style:parent-style-name="Textbody" style:family="paragraph">
      <style:paragraph-properties fo:margin-left="0.25in">
        <style:tab-stops/>
      </style:paragraph-properties>
      <style:text-properties style:font-name="Aptos Narrow" style:language-complex="he" style:country-complex="IL"/>
    </style:style>
    <style:style style:name="P73" style:parent-style-name="Textbody" style:list-style-name="LFO7"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74" style:parent-style-name="Textbody" style:list-style-name="LFO7"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75" style:parent-style-name="Textbody" style:list-style-name="LFO7"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76" style:parent-style-name="Textbody" style:family="paragraph">
      <style:paragraph-properties fo:margin-left="0.25in">
        <style:tab-stops/>
      </style:paragraph-properties>
      <style:text-properties style:font-name="Aptos Narrow" style:language-complex="he" style:country-complex="IL"/>
    </style:style>
    <style:style style:name="T77" style:parent-style-name="DefaultParagraphFont" style:family="text">
      <style:text-properties style:font-name="Aptos Narrow" style:language-complex="he" style:country-complex="IL"/>
    </style:style>
    <style:style style:name="P78" style:parent-style-name="Textbody" style:list-style-name="LFO23" style:family="paragraph">
      <style:text-properties style:font-name="Aptos Narrow" fo:font-weight="bold" style:font-weight-asian="bold" style:font-weight-complex="bold" style:language-complex="he" style:country-complex="IL"/>
    </style:style>
    <style:style style:name="P79" style:parent-style-name="Textbody" style:family="paragraph">
      <style:paragraph-properties fo:margin-left="0.25in">
        <style:tab-stops/>
      </style:paragraph-properties>
      <style:text-properties style:font-name="Aptos Narrow" style:language-complex="he" style:country-complex="IL"/>
    </style:style>
    <style:style style:name="P80" style:parent-style-name="Textbody" style:family="paragraph">
      <style:paragraph-properties fo:margin-left="0.25in">
        <style:tab-stops/>
      </style:paragraph-properties>
      <style:text-properties style:font-name="Aptos Narrow" style:language-complex="he" style:country-complex="IL"/>
    </style:style>
    <style:style style:name="P81"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2"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3"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4"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5"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6"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7"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8"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89" style:parent-style-name="Textbody" style:list-style-name="LFO8"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90" style:parent-style-name="Textbody" style:family="paragraph">
      <style:paragraph-properties fo:margin-left="0.25in">
        <style:tab-stops/>
      </style:paragraph-properties>
      <style:text-properties style:font-name="Aptos Narrow" style:language-complex="he" style:country-complex="IL"/>
    </style:style>
    <style:style style:name="P91" style:parent-style-name="Textbody" style:family="paragraph">
      <style:text-properties style:font-name="Aptos Narrow" style:language-complex="he" style:country-complex="IL"/>
    </style:style>
    <style:style style:name="P92" style:parent-style-name="Normal" style:family="paragraph">
      <style:paragraph-properties fo:break-before="page" style:writing-mode="lr-tb"/>
      <style:text-properties style:font-name="Aptos Narrow" fo:font-weight="bold" style:font-weight-asian="bold" style:font-weight-complex="bold" style:language-complex="he" style:country-complex="IL"/>
    </style:style>
    <style:style style:name="P93" style:parent-style-name="Textbody" style:list-style-name="LFO23" style:family="paragraph">
      <style:text-properties style:font-name="Aptos Narrow" fo:font-weight="bold" style:font-weight-asian="bold" style:font-weight-complex="bold" style:language-complex="he" style:country-complex="IL"/>
    </style:style>
    <style:style style:name="P94" style:parent-style-name="Textbody" style:family="paragraph">
      <style:paragraph-properties fo:margin-left="0.25in">
        <style:tab-stops/>
      </style:paragraph-properties>
      <style:text-properties style:font-name="Aptos Narrow" style:language-complex="he" style:country-complex="IL"/>
    </style:style>
    <style:style style:name="P95" style:parent-style-name="Textbody" style:family="paragraph">
      <style:paragraph-properties fo:margin-left="0.25in">
        <style:tab-stops/>
      </style:paragraph-properties>
      <style:text-properties style:font-name="Aptos Narrow" style:language-complex="he" style:country-complex="IL"/>
    </style:style>
    <style:style style:name="P96" style:parent-style-name="Textbody" style:list-style-name="LFO9"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97" style:parent-style-name="Textbody" style:list-style-name="LFO9"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98" style:parent-style-name="Textbody" style:list-style-name="LFO9"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99" style:parent-style-name="Textbody" style:list-style-name="LFO9"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100" style:parent-style-name="Textbody" style:list-style-name="LFO9"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101" style:parent-style-name="Textbody" style:list-style-name="LFO9" style:family="paragraph">
      <style:paragraph-properties fo:margin-left="0.75in">
        <style:tab-stops>
          <style:tab-stop style:type="left" style:position="0in"/>
        </style:tab-stops>
      </style:paragraph-properties>
      <style:text-properties style:font-name="Aptos Narrow" style:language-complex="he" style:country-complex="IL"/>
    </style:style>
    <style:style style:name="P102" style:parent-style-name="Textbody" style:family="paragraph">
      <style:paragraph-properties fo:margin-left="0.25in">
        <style:tab-stops/>
      </style:paragraph-properties>
      <style:text-properties style:font-name="Aptos Narrow" style:language-complex="he" style:country-complex="IL"/>
    </style:style>
    <style:style style:name="P103" style:parent-style-name="Normal" style:family="paragraph">
      <style:paragraph-properties fo:break-before="page" style:writing-mode="lr-tb"/>
      <style:text-properties style:font-name="Aptos Narrow"/>
    </style:style>
    <style:style style:name="P104" style:parent-style-name="Textbody" style:family="paragraph">
      <style:paragraph-properties fo:text-align="center"/>
      <style:text-properties style:font-name="Aptos Narrow" style:font-name-complex="Arial" fo:font-weight="bold" style:font-weight-asian="bold" style:font-weight-complex="bold" fo:font-size="72pt" style:font-size-asian="72pt" style:font-size-complex="72pt" style:language-complex="he" style:country-complex="IL"/>
    </style:style>
    <style:style style:name="P105" style:parent-style-name="Textbody" style:family="paragraph">
      <style:paragraph-properties fo:text-align="center"/>
      <style:text-properties style:font-name="Aptos Narrow" style:font-name-complex="Arial" fo:font-weight="bold" style:font-weight-asian="bold" style:font-weight-complex="bold" fo:font-size="72pt" style:font-size-asian="72pt" style:font-size-complex="72pt" style:language-complex="he" style:country-complex="IL"/>
    </style:style>
    <style:style style:name="P106" style:parent-style-name="Textbody" style:list-style-name="LFO3" style:family="paragraph">
      <style:text-properties style:font-name="Aptos Narrow" style:font-name-complex="Arial" fo:font-weight="bold" style:font-weight-asian="bold" style:font-weight-complex="bold" style:language-complex="he" style:country-complex="IL"/>
    </style:style>
    <style:style style:name="P107"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08"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09" style:parent-style-name="Textbody" style:list-style-name="LFO10"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10" style:parent-style-name="Textbody" style:list-style-name="LFO10"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11" style:parent-style-name="Textbody" style:list-style-name="LFO10"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12" style:parent-style-name="Textbody" style:list-style-name="LFO10"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13" style:parent-style-name="Textbody" style:list-style-name="LFO10"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14" style:parent-style-name="Textbody" style:list-style-name="LFO10"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15"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T116" style:parent-style-name="DefaultParagraphFont" style:family="text">
      <style:text-properties style:font-name="Aptos Narrow" style:font-name-complex="Arial" style:language-complex="he" style:country-complex="IL"/>
    </style:style>
    <style:style style:name="P117" style:parent-style-name="Textbody" style:list-style-name="LFO3" style:family="paragraph">
      <style:text-properties style:font-name="Aptos Narrow" style:font-name-complex="Arial" fo:font-weight="bold" style:font-weight-asian="bold" style:font-weight-complex="bold" style:language-complex="he" style:country-complex="IL"/>
    </style:style>
    <style:style style:name="P118"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19"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20" style:parent-style-name="Textbody" style:list-style-name="LFO11"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1" style:parent-style-name="Textbody" style:list-style-name="LFO11"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2" style:parent-style-name="Textbody" style:list-style-name="LFO11"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3" style:parent-style-name="Textbody" style:list-style-name="LFO11"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4"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25"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26" style:parent-style-name="Textbody" style:list-style-name="LFO12"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7" style:parent-style-name="Textbody" style:list-style-name="LFO12"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8" style:parent-style-name="Textbody" style:list-style-name="LFO12"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29" style:parent-style-name="Textbody" style:list-style-name="LFO12"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30"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31" style:parent-style-name="Normal" style:family="paragraph">
      <style:paragraph-properties fo:break-before="page" style:writing-mode="lr-tb"/>
      <style:text-properties style:font-name="Aptos Narrow" style:font-name-complex="Arial" fo:font-weight="bold" style:font-weight-asian="bold" style:font-weight-complex="bold" style:language-complex="he" style:country-complex="IL"/>
    </style:style>
    <style:style style:name="P132" style:parent-style-name="Textbody" style:list-style-name="LFO3" style:family="paragraph">
      <style:text-properties style:font-name="Aptos Narrow" style:font-name-complex="Arial" fo:font-weight="bold" style:font-weight-asian="bold" style:font-weight-complex="bold" style:language-complex="he" style:country-complex="IL"/>
    </style:style>
    <style:style style:name="P133"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34"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35" style:parent-style-name="Textbody" style:list-style-name="LFO13"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36" style:parent-style-name="Textbody" style:list-style-name="LFO13"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37" style:parent-style-name="Textbody" style:list-style-name="LFO13"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38" style:parent-style-name="Textbody" style:list-style-name="LFO13" style:family="paragraph">
      <style:paragraph-properties fo:margin-left="0.9375in">
        <style:tab-stops>
          <style:tab-stop style:type="left" style:position="0in"/>
        </style:tab-stops>
      </style:paragraph-properties>
      <style:text-properties style:font-name="Aptos Narrow" style:font-name-complex="Arial" style:language-complex="he" style:country-complex="IL"/>
    </style:style>
    <style:style style:name="P139"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T140" style:parent-style-name="DefaultParagraphFont" style:family="text">
      <style:text-properties style:font-name="Aptos Narrow" style:font-name-complex="Arial" style:language-complex="he" style:country-complex="IL"/>
    </style:style>
    <style:style style:name="P141" style:parent-style-name="Textbody" style:list-style-name="LFO3" style:family="paragraph">
      <style:text-properties style:font-name="Aptos Narrow" style:font-name-complex="Arial" fo:font-weight="bold" style:font-weight-asian="bold" style:font-weight-complex="bold" style:language-complex="he" style:country-complex="IL"/>
    </style:style>
    <style:style style:name="P142"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P143" style:parent-style-name="Textbody" style:family="paragraph">
      <style:paragraph-properties fo:margin-left="0.4375in">
        <style:tab-stops/>
      </style:paragraph-properties>
      <style:text-properties style:font-name="Aptos Narrow" style:font-name-complex="Arial" style:language-complex="he" style:country-complex="IL"/>
    </style:style>
    <style:style style:name="T144" style:parent-style-name="DefaultParagraphFont" style:family="text">
      <style:text-properties style:font-name="Aptos Narrow" style:font-name-complex="Arial" style:language-complex="he" style:country-complex="IL"/>
    </style:style>
    <style:style style:name="P145" style:parent-style-name="Style1" style:list-style-name="LFO12" style:family="paragraph"/>
    <style:style style:name="P146" style:parent-style-name="Textbody" style:list-style-name="LFO22" style:family="paragraph">
      <style:text-properties style:font-name="Aptos Narrow" style:font-name-complex="Arial" fo:font-weight="bold" style:font-weight-asian="bold" style:font-weight-complex="bold" style:language-complex="he" style:country-complex="IL"/>
    </style:style>
    <style:style style:name="P147"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48"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49" style:parent-style-name="Textbody" style:list-style-name="LFO14"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50" style:parent-style-name="Textbody" style:list-style-name="LFO14"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51" style:parent-style-name="Textbody" style:list-style-name="LFO14"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52"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53" style:parent-style-name="Textbody" style:family="paragraph">
      <style:paragraph-properties fo:margin-left="0.4923in">
        <style:tab-stops/>
      </style:paragraph-properties>
    </style:style>
    <style:style style:name="T154" style:parent-style-name="DefaultParagraphFont" style:family="text">
      <style:text-properties style:font-name="Aptos Narrow" style:font-name-complex="Arial" style:language-complex="he" style:country-complex="IL"/>
    </style:style>
    <style:style style:name="P155" style:parent-style-name="Normal" style:family="paragraph">
      <style:paragraph-properties fo:break-before="page" style:writing-mode="lr-tb"/>
      <style:text-properties style:font-name="Aptos Narrow" style:font-name-complex="Arial" fo:font-weight="bold" style:font-weight-asian="bold" style:font-weight-complex="bold" style:language-complex="he" style:country-complex="IL"/>
    </style:style>
    <style:style style:name="P156" style:parent-style-name="Textbody" style:list-style-name="LFO22" style:family="paragraph">
      <style:text-properties style:font-name="Aptos Narrow" style:font-name-complex="Arial" fo:font-weight="bold" style:font-weight-asian="bold" style:font-weight-complex="bold" style:language-complex="he" style:country-complex="IL"/>
    </style:style>
    <style:style style:name="P157"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58"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59" style:parent-style-name="Textbody" style:list-style-name="LFO15" style:family="paragraph">
      <style:text-properties style:font-name="Aptos Narrow" style:font-name-complex="Arial" style:language-complex="he" style:country-complex="IL"/>
    </style:style>
    <style:style style:name="P160" style:parent-style-name="Textbody" style:list-style-name="LFO15" style:family="paragraph">
      <style:text-properties style:font-name="Aptos Narrow" style:font-name-complex="Arial" style:language-complex="he" style:country-complex="IL"/>
    </style:style>
    <style:style style:name="P161" style:parent-style-name="Textbody" style:list-style-name="LFO15" style:family="paragraph">
      <style:text-properties style:font-name="Aptos Narrow" style:font-name-complex="Arial" style:language-complex="he" style:country-complex="IL"/>
    </style:style>
    <style:style style:name="P162" style:parent-style-name="Textbody" style:family="paragraph">
      <style:paragraph-properties fo:margin-left="0.25in">
        <style:tab-stops/>
      </style:paragraph-properties>
      <style:text-properties style:font-name="Aptos Narrow" style:font-name-complex="Arial" style:language-complex="he" style:country-complex="IL"/>
    </style:style>
    <style:style style:name="P163" style:parent-style-name="Textbody" style:family="paragraph">
      <style:paragraph-properties fo:margin-left="0.25in" fo:background-color="#000000">
        <style:tab-stops/>
        <style:background-fill draw:fill="solid" draw:fill-color="#000000"/>
      </style:paragraph-properties>
      <style:text-properties style:font-name="Courier New" style:font-name-complex="Courier New" fo:color="#4EA72E" style:language-complex="he" style:country-complex="IL"/>
    </style:style>
    <style:style style:name="P164" style:parent-style-name="Textbody" style:family="paragraph">
      <style:paragraph-properties fo:margin-left="0.25in">
        <style:tab-stops/>
      </style:paragraph-properties>
      <style:text-properties style:font-name="Aptos Narrow" style:font-name-complex="Arial" style:language-complex="he" style:country-complex="IL"/>
    </style:style>
    <style:style style:name="T165" style:parent-style-name="DefaultParagraphFont" style:family="text">
      <style:text-properties style:font-name="Aptos Narrow" style:font-name-complex="Arial" style:language-complex="he" style:country-complex="IL"/>
    </style:style>
    <style:style style:name="P166" style:parent-style-name="Textbody" style:list-style-name="LFO22" style:family="paragraph">
      <style:text-properties style:font-name="Aptos Narrow" style:font-name-complex="Arial" fo:font-weight="bold" style:font-weight-asian="bold" style:font-weight-complex="bold" style:language-complex="he" style:country-complex="IL"/>
    </style:style>
    <style:style style:name="P167"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68"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69" style:parent-style-name="Textbody" style:list-style-name="LFO16"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0" style:parent-style-name="Textbody" style:list-style-name="LFO16"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1" style:parent-style-name="Textbody" style:list-style-name="LFO16"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2" style:parent-style-name="Textbody" style:list-style-name="LFO16"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3"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74" style:parent-style-name="Textbody" style:list-style-name="LFO17"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5" style:parent-style-name="Textbody" style:list-style-name="LFO17"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6" style:parent-style-name="Textbody" style:list-style-name="LFO17"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7" style:parent-style-name="Textbody" style:list-style-name="LFO17"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8" style:parent-style-name="Textbody" style:list-style-name="LFO17"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79" style:parent-style-name="Textbody" style:list-style-name="LFO17"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80"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T181" style:parent-style-name="DefaultParagraphFont" style:family="text">
      <style:text-properties style:font-name="Aptos Narrow" style:font-name-complex="Arial" style:language-complex="he" style:country-complex="IL"/>
    </style:style>
    <style:style style:name="P182" style:parent-style-name="Normal" style:family="paragraph">
      <style:paragraph-properties fo:break-before="page" style:writing-mode="lr-tb"/>
      <style:text-properties style:font-name="Aptos Narrow" style:font-name-complex="Arial" fo:font-weight="bold" style:font-weight-asian="bold" style:font-weight-complex="bold" style:language-complex="he" style:country-complex="IL"/>
    </style:style>
    <style:style style:name="P183" style:parent-style-name="Textbody" style:list-style-name="LFO22" style:family="paragraph">
      <style:text-properties style:font-name="Aptos Narrow" style:font-name-complex="Arial" fo:font-weight="bold" style:font-weight-asian="bold" style:font-weight-complex="bold" style:language-complex="he" style:country-complex="IL"/>
    </style:style>
    <style:style style:name="P184"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85"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86" style:parent-style-name="Textbody" style:list-style-name="LFO18"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87" style:parent-style-name="Textbody" style:list-style-name="LFO18"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88" style:parent-style-name="Textbody" style:list-style-name="LFO18"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89" style:parent-style-name="Textbody" style:list-style-name="LFO18"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90"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91"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92" style:parent-style-name="Textbody" style:list-style-name="LFO19"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93" style:parent-style-name="Textbody" style:list-style-name="LFO19"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194" style:parent-style-name="Textbody" style:list-style-name="LFO19"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T195" style:parent-style-name="DefaultParagraphFont" style:family="text">
      <style:text-properties style:font-name="Aptos Narrow" style:font-name-complex="Arial" style:language-complex="he" style:country-complex="IL"/>
    </style:style>
    <style:style style:name="P196" style:parent-style-name="Textbody" style:list-style-name="LFO22" style:family="paragraph">
      <style:text-properties style:font-name="Aptos Narrow" style:font-name-complex="Arial" fo:font-weight="bold" style:font-weight-asian="bold" style:font-weight-complex="bold" style:language-complex="he" style:country-complex="IL"/>
    </style:style>
    <style:style style:name="P197"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98"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199"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00"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01" style:parent-style-name="Textbody" style:family="paragraph">
      <style:paragraph-properties fo:margin-left="0.25in" fo:background-color="#000000">
        <style:tab-stops/>
        <style:background-fill draw:fill="solid" draw:fill-color="#000000"/>
      </style:paragraph-properties>
      <style:text-properties style:font-name="Courier New" style:font-name-complex="Courier New" fo:color="#4EA72E" style:language-complex="he" style:country-complex="IL"/>
    </style:style>
    <style:style style:name="P202"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03" style:parent-style-name="Textbody" style:list-style-name="LFO20"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04" style:parent-style-name="Textbody" style:list-style-name="LFO20"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05" style:parent-style-name="Textbody" style:list-style-name="LFO20"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06" style:parent-style-name="Textbody" style:list-style-name="LFO20"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07"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08" style:parent-style-name="Textbody" style:family="paragraph">
      <style:text-properties style:font-name="Aptos Narrow" style:font-name-complex="Arial" style:language-complex="he" style:country-complex="IL"/>
    </style:style>
    <style:style style:name="P209" style:parent-style-name="Textbody" style:list-style-name="LFO22" style:family="paragraph">
      <style:text-properties style:font-name="Aptos Narrow" style:font-name-complex="Arial" fo:font-weight="bold" style:font-weight-asian="bold" style:font-weight-complex="bold" style:language-complex="he" style:country-complex="IL"/>
    </style:style>
    <style:style style:name="P210"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11"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12"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3"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4"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5"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6"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7"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8" style:parent-style-name="Textbody" style:list-style-name="LFO21" style:family="paragraph">
      <style:paragraph-properties fo:margin-left="0.9923in">
        <style:tab-stops>
          <style:tab-stop style:type="left" style:position="0in"/>
        </style:tab-stops>
      </style:paragraph-properties>
      <style:text-properties style:font-name="Aptos Narrow" style:font-name-complex="Arial" style:language-complex="he" style:country-complex="IL"/>
    </style:style>
    <style:style style:name="P219" style:parent-style-name="Textbody" style:family="paragraph">
      <style:paragraph-properties fo:margin-left="0.4923in">
        <style:tab-stops/>
      </style:paragraph-properties>
      <style:text-properties style:font-name="Aptos Narrow" style:font-name-complex="Arial" style:language-complex="he" style:country-complex="IL"/>
    </style:style>
    <style:style style:name="P220" style:parent-style-name="Normal" style:family="paragraph">
      <style:paragraph-properties fo:break-before="page" style:writing-mode="lr-tb"/>
      <style:text-properties style:font-name="Aptos Narrow" style:font-name-complex="Arial" style:language-complex="he" style:country-complex="IL"/>
    </style:style>
    <style:style style:name="P221" style:parent-style-name="Textbody" style:family="paragraph">
      <style:text-properties style:font-name="Aptos Narrow" style:font-name-complex="Arial" fo:font-weight="bold" style:font-weight-asian="bold" style:font-weight-complex="bold" style:language-complex="he" style:country-complex="IL"/>
    </style:style>
    <style:style style:name="P222" style:parent-style-name="Textbody" style:family="paragraph">
      <style:text-properties style:font-name="Aptos Narrow" style:font-name-complex="Arial" fo:font-weight="bold" style:font-weight-asian="bold" style:font-weight-complex="bold" style:language-complex="he" style:country-complex="IL"/>
    </style:style>
    <style:style style:name="P223" style:parent-style-name="Textbody" style:family="paragraph">
      <style:text-properties style:font-name="Aptos Narrow" style:font-name-complex="Arial" fo:font-weight="bold" style:font-weight-asian="bold" style:font-weight-complex="bold" style:language-complex="he" style:country-complex="IL"/>
    </style:style>
    <style:style style:name="P224" style:parent-style-name="Textbody" style:family="paragraph">
      <style:text-properties style:font-name="Aptos Narrow" style:font-name-complex="Arial" style:language-complex="he" style:country-complex="IL"/>
    </style:style>
    <style:style style:name="P225" style:parent-style-name="Textbody" style:family="paragraph">
      <style:text-properties style:font-name="Aptos Narrow" style:font-name-complex="Arial" style:language-complex="he" style:country-complex="IL"/>
    </style:style>
    <style:style style:name="P226" style:parent-style-name="Textbody" style:family="paragraph">
      <style:text-properties style:font-name="Aptos Narrow" style:font-name-complex="Arial" style:language-complex="he" style:country-complex="IL"/>
    </style:style>
    <style:style style:name="T227" style:parent-style-name="DefaultParagraphFont" style:family="text">
      <style:text-properties style:font-name="Aptos Narrow" style:font-name-complex="Arial" style:language-complex="he" style:country-complex="IL"/>
    </style:style>
    <style:style style:name="P228" style:parent-style-name="Textbody" style:family="paragraph">
      <style:text-properties style:font-name="Aptos Narrow" style:font-name-complex="Arial" fo:font-weight="bold" style:font-weight-asian="bold" style:font-weight-complex="bold" style:language-complex="he" style:country-complex="IL"/>
    </style:style>
    <style:style style:name="P229" style:parent-style-name="Textbody" style:family="paragraph">
      <style:text-properties style:font-name="Aptos Narrow" style:font-name-complex="Arial" style:language-complex="he" style:country-complex="IL"/>
    </style:style>
    <style:style style:name="P230" style:parent-style-name="Textbody" style:list-style-name="LFO24" style:family="paragraph">
      <style:text-properties style:font-name="Aptos Narrow" style:font-name-complex="Arial" style:language-complex="he" style:country-complex="IL"/>
    </style:style>
    <style:style style:name="P231" style:parent-style-name="Textbody" style:list-style-name="LFO24" style:family="paragraph">
      <style:text-properties style:font-name="Aptos Narrow" style:font-name-complex="Arial" style:language-complex="he" style:country-complex="IL"/>
    </style:style>
    <style:style style:name="P232" style:parent-style-name="Textbody" style:list-style-name="LFO24" style:family="paragraph">
      <style:text-properties style:font-name="Aptos Narrow" style:font-name-complex="Arial" style:language-complex="he" style:country-complex="IL"/>
    </style:style>
    <style:style style:name="P233" style:parent-style-name="Textbody" style:list-style-name="LFO24" style:family="paragraph">
      <style:text-properties style:font-name="Aptos Narrow" style:font-name-complex="Arial" style:language-complex="he" style:country-complex="IL"/>
    </style:style>
    <style:style style:name="P234" style:parent-style-name="Textbody" style:list-style-name="LFO24" style:family="paragraph">
      <style:text-properties style:font-name="Aptos Narrow" style:font-name-complex="Arial" style:language-complex="he" style:country-complex="IL"/>
    </style:style>
    <style:style style:name="P235" style:parent-style-name="Textbody" style:family="paragraph">
      <style:text-properties style:font-name="Aptos Narrow" style:font-name-complex="Arial" style:language-complex="he" style:country-complex="IL"/>
    </style:style>
    <style:style style:name="P236" style:parent-style-name="Textbody" style:family="paragraph">
      <style:text-properties style:font-name="Aptos Narrow" style:font-name-complex="Arial" style:language-complex="he" style:country-complex="IL"/>
    </style:style>
    <style:style style:name="T237" style:parent-style-name="DefaultParagraphFont" style:family="text">
      <style:text-properties style:font-name="Aptos Narrow" style:font-name-complex="Arial" style:language-complex="he" style:country-complex="IL"/>
    </style:style>
    <style:style style:name="P238" style:parent-style-name="Textbody" style:family="paragraph">
      <style:text-properties style:font-name="Aptos Narrow" style:font-name-complex="Arial" fo:font-weight="bold" style:font-weight-asian="bold" style:font-weight-complex="bold" style:language-complex="he" style:country-complex="IL"/>
    </style:style>
    <style:style style:name="P239" style:parent-style-name="Textbody" style:family="paragraph">
      <style:text-properties style:font-name="Aptos Narrow" style:font-name-complex="Arial" style:language-complex="he" style:country-complex="IL"/>
    </style:style>
    <style:style style:name="P240" style:parent-style-name="Textbody" style:family="paragraph">
      <style:text-properties style:font-name="Aptos Narrow" style:font-name-complex="Arial" style:language-complex="he" style:country-complex="IL"/>
    </style:style>
    <style:style style:name="P241" style:parent-style-name="Textbody" style:list-style-name="LFO25" style:family="paragraph">
      <style:text-properties style:font-name="Aptos Narrow" style:font-name-complex="Arial" style:language-complex="he" style:country-complex="IL"/>
    </style:style>
    <style:style style:name="P242" style:parent-style-name="Textbody" style:list-style-name="LFO25" style:family="paragraph">
      <style:text-properties style:font-name="Aptos Narrow" style:font-name-complex="Arial" style:language-complex="he" style:country-complex="IL"/>
    </style:style>
    <style:style style:name="P243" style:parent-style-name="Textbody" style:family="paragraph">
      <style:text-properties style:font-name="Aptos Narrow" style:font-name-complex="Arial" style:language-complex="he" style:country-complex="IL"/>
    </style:style>
    <style:style style:name="P244" style:parent-style-name="Textbody" style:family="paragraph">
      <style:text-properties style:font-name="Aptos Narrow" style:font-name-complex="Arial" style:language-complex="he" style:country-complex="IL"/>
    </style:style>
    <style:style style:name="P245" style:parent-style-name="Textbody" style:list-style-name="LFO26" style:family="paragraph">
      <style:text-properties style:font-name="Aptos Narrow" style:font-name-complex="Arial" style:language-complex="he" style:country-complex="IL"/>
    </style:style>
    <style:style style:name="P246" style:parent-style-name="Textbody" style:list-style-name="LFO26" style:family="paragraph">
      <style:text-properties style:font-name="Aptos Narrow" style:font-name-complex="Arial" style:language-complex="he" style:country-complex="IL"/>
    </style:style>
    <style:style style:name="P247" style:parent-style-name="Textbody" style:list-style-name="LFO26" style:family="paragraph">
      <style:text-properties style:font-name="Aptos Narrow" style:font-name-complex="Arial" style:language-complex="he" style:country-complex="IL"/>
    </style:style>
    <style:style style:name="P248" style:parent-style-name="Textbody" style:family="paragraph">
      <style:text-properties style:font-name="Aptos Narrow" style:font-name-complex="Arial" style:language-complex="he" style:country-complex="IL"/>
    </style:style>
    <style:style style:name="T249" style:parent-style-name="DefaultParagraphFont" style:family="text">
      <style:text-properties style:font-name="Aptos Narrow" style:font-name-complex="Arial" style:language-complex="he" style:country-complex="IL"/>
    </style:style>
    <style:style style:name="P250" style:parent-style-name="Textbody" style:family="paragraph">
      <style:text-properties style:font-name="Aptos Narrow" style:font-name-complex="Arial" fo:font-weight="bold" style:font-weight-asian="bold" style:font-weight-complex="bold" style:language-complex="he" style:country-complex="IL"/>
    </style:style>
    <style:style style:name="P251" style:parent-style-name="Textbody" style:family="paragraph">
      <style:text-properties style:font-name="Aptos Narrow" style:font-name-complex="Arial" style:language-complex="he" style:country-complex="IL"/>
    </style:style>
    <style:style style:name="P252" style:parent-style-name="Textbody" style:family="paragraph">
      <style:text-properties style:font-name="Aptos Narrow" style:font-name-complex="Arial" style:language-complex="he" style:country-complex="IL"/>
    </style:style>
    <style:style style:name="P253" style:parent-style-name="Textbody" style:list-style-name="LFO27" style:family="paragraph">
      <style:text-properties style:font-name="Aptos Narrow" style:font-name-complex="Arial" style:language-complex="he" style:country-complex="IL"/>
    </style:style>
    <style:style style:name="P254" style:parent-style-name="Textbody" style:family="paragraph">
      <style:text-properties style:font-name="Aptos Narrow" style:font-name-complex="Arial" style:language-complex="he" style:country-complex="IL"/>
    </style:style>
    <style:style style:name="P255" style:parent-style-name="Textbody" style:family="paragraph">
      <style:text-properties style:font-name="Aptos Narrow" style:font-name-complex="Arial" style:language-complex="he" style:country-complex="IL"/>
    </style:style>
    <style:style style:name="P256" style:parent-style-name="Textbody" style:list-style-name="LFO28" style:family="paragraph">
      <style:text-properties style:font-name="Aptos Narrow" style:font-name-complex="Arial" style:language-complex="he" style:country-complex="IL"/>
    </style:style>
    <style:style style:name="P257" style:parent-style-name="Textbody" style:list-style-name="LFO28" style:family="paragraph">
      <style:text-properties style:font-name="Aptos Narrow" style:font-name-complex="Arial" style:language-complex="he" style:country-complex="IL"/>
    </style:style>
    <style:style style:name="P258" style:parent-style-name="Textbody" style:list-style-name="LFO28" style:family="paragraph">
      <style:text-properties style:font-name="Aptos Narrow" style:font-name-complex="Arial" style:language-complex="he" style:country-complex="IL"/>
    </style:style>
    <style:style style:name="P259" style:parent-style-name="Textbody" style:family="paragraph">
      <style:text-properties style:font-name="Aptos Narrow" style:font-name-complex="Arial" style:language-complex="he" style:country-complex="IL"/>
    </style:style>
    <style:style style:name="T260" style:parent-style-name="DefaultParagraphFont" style:family="text">
      <style:text-properties style:font-name="Aptos Narrow" style:font-name-complex="Arial" style:language-complex="he" style:country-complex="IL"/>
    </style:style>
    <style:style style:name="P261" style:parent-style-name="Textbody" style:family="paragraph">
      <style:text-properties style:font-name="Aptos Narrow" style:font-name-complex="Arial" fo:font-weight="bold" style:font-weight-asian="bold" style:font-weight-complex="bold" style:language-complex="he" style:country-complex="IL"/>
    </style:style>
    <style:style style:name="P262" style:parent-style-name="Textbody" style:family="paragraph">
      <style:text-properties style:font-name="Aptos Narrow" style:font-name-complex="Arial" style:language-complex="he" style:country-complex="IL"/>
    </style:style>
    <style:style style:name="P263" style:parent-style-name="Textbody" style:family="paragraph">
      <style:text-properties style:font-name="Aptos Narrow" style:font-name-complex="Arial" style:language-complex="he" style:country-complex="IL"/>
    </style:style>
    <style:style style:name="P264" style:parent-style-name="Textbody" style:family="paragraph">
      <style:text-properties style:font-name="Aptos Narrow" style:font-name-complex="Arial" style:language-complex="he" style:country-complex="IL"/>
    </style:style>
    <style:style style:name="P265" style:parent-style-name="Textbody" style:family="paragraph">
      <style:text-properties style:font-name="Aptos Narrow" style:font-name-complex="Arial" style:language-complex="he" style:country-complex="IL"/>
    </style:style>
    <style:style style:name="P266" style:parent-style-name="Textbody" style:list-style-name="LFO29" style:family="paragraph">
      <style:text-properties style:font-name="Aptos Narrow" style:font-name-complex="Arial" style:language-complex="he" style:country-complex="IL"/>
    </style:style>
    <style:style style:name="P267" style:parent-style-name="Textbody" style:family="paragraph">
      <style:text-properties style:font-name="Aptos Narrow" style:font-name-complex="Arial" style:language-complex="he" style:country-complex="IL"/>
    </style:style>
    <style:style style:name="P268" style:parent-style-name="Textbody" style:family="paragraph">
      <style:text-properties style:font-name="Aptos Narrow" style:font-name-complex="Arial" style:language-complex="he" style:country-complex="IL"/>
    </style:style>
    <style:style style:name="T269" style:parent-style-name="DefaultParagraphFont" style:family="text">
      <style:text-properties style:font-name="Aptos Narrow" style:font-name-complex="Arial" style:language-complex="he" style:country-complex="IL"/>
    </style:style>
    <style:style style:name="P270" style:parent-style-name="Textbody" style:family="paragraph">
      <style:text-properties style:font-name="Aptos Narrow" style:font-name-complex="Arial" fo:font-weight="bold" style:font-weight-asian="bold" style:font-weight-complex="bold" style:language-complex="he" style:country-complex="IL"/>
    </style:style>
    <style:style style:name="P271" style:parent-style-name="Textbody" style:family="paragraph">
      <style:text-properties style:font-name="Aptos Narrow" style:font-name-complex="Arial" style:language-complex="he" style:country-complex="IL"/>
    </style:style>
    <style:style style:name="P272" style:parent-style-name="Textbody" style:family="paragraph">
      <style:text-properties style:font-name="Aptos Narrow" style:font-name-complex="Arial" style:language-complex="he" style:country-complex="IL"/>
    </style:style>
    <style:style style:name="P273" style:parent-style-name="Textbody" style:list-style-name="LFO30" style:family="paragraph">
      <style:text-properties style:font-name="Aptos Narrow" style:font-name-complex="Arial" style:language-complex="he" style:country-complex="IL"/>
    </style:style>
    <style:style style:name="P274" style:parent-style-name="Textbody" style:list-style-name="LFO30" style:family="paragraph">
      <style:text-properties style:font-name="Aptos Narrow" style:font-name-complex="Arial" style:language-complex="he" style:country-complex="IL"/>
    </style:style>
    <style:style style:name="P275" style:parent-style-name="Textbody" style:list-style-name="LFO30" style:family="paragraph">
      <style:text-properties style:font-name="Aptos Narrow" style:font-name-complex="Arial" style:language-complex="he" style:country-complex="IL"/>
    </style:style>
    <style:style style:name="P276" style:parent-style-name="Textbody" style:list-style-name="LFO30" style:family="paragraph">
      <style:text-properties style:font-name="Aptos Narrow" style:font-name-complex="Arial" style:language-complex="he" style:country-complex="IL"/>
    </style:style>
    <style:style style:name="P277" style:parent-style-name="Textbody" style:list-style-name="LFO30" style:family="paragraph">
      <style:text-properties style:font-name="Aptos Narrow" style:font-name-complex="Arial" style:language-complex="he" style:country-complex="IL"/>
    </style:style>
    <style:style style:name="P278" style:parent-style-name="Textbody" style:list-style-name="LFO30" style:family="paragraph">
      <style:text-properties style:font-name="Aptos Narrow" style:font-name-complex="Arial" style:language-complex="he" style:country-complex="IL"/>
    </style:style>
    <style:style style:name="P279" style:parent-style-name="Textbody" style:family="paragraph">
      <style:text-properties style:font-name="Aptos Narrow" style:font-name-complex="Arial" style:language-complex="he" style:country-complex="IL"/>
    </style:style>
    <style:style style:name="P280" style:parent-style-name="Textbody" style:list-style-name="LFO31" style:family="paragraph">
      <style:text-properties style:font-name="Aptos Narrow" style:font-name-complex="Arial" style:language-complex="he" style:country-complex="IL"/>
    </style:style>
    <style:style style:name="P281" style:parent-style-name="Textbody" style:list-style-name="LFO31" style:family="paragraph">
      <style:text-properties style:font-name="Aptos Narrow" style:font-name-complex="Arial" style:language-complex="he" style:country-complex="IL"/>
    </style:style>
    <style:style style:name="P282" style:parent-style-name="Textbody" style:list-style-name="LFO31" style:family="paragraph">
      <style:text-properties style:font-name="Aptos Narrow" style:font-name-complex="Arial" style:language-complex="he" style:country-complex="IL"/>
    </style:style>
    <style:style style:name="P283" style:parent-style-name="Textbody" style:list-style-name="LFO31" style:family="paragraph">
      <style:text-properties style:font-name="Aptos Narrow" style:font-name-complex="Arial" style:language-complex="he" style:country-complex="IL"/>
    </style:style>
    <style:style style:name="P284" style:parent-style-name="Textbody" style:family="paragraph">
      <style:text-properties style:font-name="Aptos Narrow" style:font-name-complex="Arial" style:language-complex="he" style:country-complex="IL"/>
    </style:style>
    <style:style style:name="P285" style:parent-style-name="Textbody" style:family="paragraph">
      <style:text-properties style:font-name="Aptos Narrow" style:font-name-complex="Arial" style:language-complex="he" style:country-complex="IL"/>
    </style:style>
    <style:style style:name="T286" style:parent-style-name="DefaultParagraphFont" style:family="text">
      <style:text-properties style:font-name="Aptos Narrow" style:font-name-complex="Arial" style:language-complex="he" style:country-complex="IL"/>
    </style:style>
    <style:style style:name="P287" style:parent-style-name="Textbody" style:family="paragraph">
      <style:text-properties style:font-name="Aptos Narrow" style:font-name-complex="Arial" fo:font-weight="bold" style:font-weight-asian="bold" style:font-weight-complex="bold" style:language-complex="he" style:country-complex="IL"/>
    </style:style>
    <style:style style:name="P288" style:parent-style-name="Textbody" style:family="paragraph">
      <style:text-properties style:font-name="Aptos Narrow" style:font-name-complex="Arial" style:language-complex="he" style:country-complex="IL"/>
    </style:style>
    <style:style style:name="P289" style:parent-style-name="Textbody" style:family="paragraph">
      <style:text-properties style:font-name="Aptos Narrow" style:font-name-complex="Arial" style:language-complex="he" style:country-complex="IL"/>
    </style:style>
    <style:style style:name="P290" style:parent-style-name="Textbody" style:family="paragraph">
      <style:text-properties style:font-name="Aptos Narrow" style:font-name-complex="Arial" style:language-complex="he" style:country-complex="IL"/>
    </style:style>
    <style:style style:name="P291" style:parent-style-name="Textbody" style:list-style-name="LFO32" style:family="paragraph">
      <style:text-properties style:font-name="Aptos Narrow" style:font-name-complex="Arial" style:language-complex="he" style:country-complex="IL"/>
    </style:style>
    <style:style style:name="P292" style:parent-style-name="Textbody" style:family="paragraph">
      <style:text-properties style:font-name="Aptos Narrow" style:font-name-complex="Arial" style:language-complex="he" style:country-complex="IL"/>
    </style:style>
    <style:style style:name="P293" style:parent-style-name="Textbody" style:list-style-name="LFO33" style:family="paragraph">
      <style:text-properties style:font-name="Aptos Narrow" style:font-name-complex="Arial" style:language-complex="he" style:country-complex="IL"/>
    </style:style>
    <style:style style:name="P294" style:parent-style-name="Textbody" style:list-style-name="LFO33" style:family="paragraph">
      <style:text-properties style:font-name="Aptos Narrow" style:font-name-complex="Arial" style:language-complex="he" style:country-complex="IL"/>
    </style:style>
    <style:style style:name="P295" style:parent-style-name="Textbody" style:list-style-name="LFO33" style:family="paragraph">
      <style:text-properties style:font-name="Aptos Narrow" style:font-name-complex="Arial" style:language-complex="he" style:country-complex="IL"/>
    </style:style>
    <style:style style:name="P296" style:parent-style-name="Textbody" style:family="paragraph">
      <style:text-properties style:font-name="Aptos Narrow" style:font-name-complex="Arial" style:language-complex="he" style:country-complex="IL"/>
    </style:style>
    <style:style style:name="T297" style:parent-style-name="DefaultParagraphFont" style:family="text">
      <style:text-properties style:font-name="Aptos Narrow" style:font-name-complex="Arial" style:language-complex="he" style:country-complex="IL"/>
    </style:style>
    <style:style style:name="P298" style:parent-style-name="Textbody" style:family="paragraph">
      <style:text-properties style:font-name="Aptos Narrow" style:font-name-complex="Arial" fo:font-weight="bold" style:font-weight-asian="bold" style:font-weight-complex="bold" style:language-complex="he" style:country-complex="IL"/>
    </style:style>
    <style:style style:name="P299" style:parent-style-name="Textbody" style:family="paragraph">
      <style:text-properties style:font-name="Aptos Narrow" style:font-name-complex="Arial" style:language-complex="he" style:country-complex="IL"/>
    </style:style>
    <style:style style:name="P300" style:parent-style-name="Textbody" style:family="paragraph">
      <style:text-properties style:font-name="Aptos Narrow" style:font-name-complex="Arial" style:language-complex="he" style:country-complex="IL"/>
    </style:style>
    <style:style style:name="P301" style:parent-style-name="Textbody" style:family="paragraph">
      <style:text-properties style:font-name="Aptos Narrow" style:font-name-complex="Arial" style:language-complex="he" style:country-complex="IL"/>
    </style:style>
    <style:style style:name="P302" style:parent-style-name="Textbody" style:list-style-name="LFO34" style:family="paragraph">
      <style:text-properties style:font-name="Aptos Narrow" style:font-name-complex="Arial" style:language-complex="he" style:country-complex="IL"/>
    </style:style>
    <style:style style:name="P303" style:parent-style-name="Textbody" style:list-style-name="LFO34" style:family="paragraph">
      <style:text-properties style:font-name="Aptos Narrow" style:font-name-complex="Arial" style:language-complex="he" style:country-complex="IL"/>
    </style:style>
    <style:style style:name="P304" style:parent-style-name="Textbody" style:list-style-name="LFO34" style:family="paragraph">
      <style:text-properties style:font-name="Aptos Narrow" style:font-name-complex="Arial" style:language-complex="he" style:country-complex="IL"/>
    </style:style>
    <style:style style:name="P305" style:parent-style-name="Textbody" style:list-style-name="LFO34" style:family="paragraph">
      <style:text-properties style:font-name="Aptos Narrow" style:font-name-complex="Arial" style:language-complex="he" style:country-complex="IL"/>
    </style:style>
    <style:style style:name="P306" style:parent-style-name="Textbody" style:family="paragraph">
      <style:text-properties style:font-name="Aptos Narrow" style:font-name-complex="Arial" style:language-complex="he" style:country-complex="IL"/>
    </style:style>
    <style:style style:name="T307" style:parent-style-name="DefaultParagraphFont" style:family="text">
      <style:text-properties style:font-name="Aptos Narrow" style:font-name-complex="Arial" style:language-complex="he" style:country-complex="IL"/>
    </style:style>
    <style:style style:name="P308" style:parent-style-name="Textbody" style:family="paragraph">
      <style:text-properties style:font-name="Aptos Narrow" style:font-name-complex="Arial" fo:font-weight="bold" style:font-weight-asian="bold" style:font-weight-complex="bold" style:language-complex="he" style:country-complex="IL"/>
    </style:style>
    <style:style style:name="P309" style:parent-style-name="Textbody" style:family="paragraph">
      <style:text-properties style:font-name="Aptos Narrow" style:font-name-complex="Arial" style:language-complex="he" style:country-complex="IL"/>
    </style:style>
    <style:style style:name="P310" style:parent-style-name="Textbody" style:family="paragraph">
      <style:text-properties style:font-name="Aptos Narrow" style:font-name-complex="Arial" style:language-complex="he" style:country-complex="IL"/>
    </style:style>
    <style:style style:name="P311" style:parent-style-name="Textbody" style:family="paragraph">
      <style:text-properties style:font-name="Aptos Narrow" style:font-name-complex="Arial" style:language-complex="he" style:country-complex="IL"/>
    </style:style>
    <style:style style:name="P312" style:parent-style-name="Textbody" style:family="paragraph">
      <style:text-properties style:font-name="Aptos Narrow" style:font-name-complex="Arial" style:language-complex="he" style:country-complex="IL"/>
    </style:style>
    <style:style style:name="P313" style:parent-style-name="Textbody" style:list-style-name="LFO35" style:family="paragraph">
      <style:text-properties style:font-name="Aptos Narrow" style:font-name-complex="Arial" style:language-complex="he" style:country-complex="IL"/>
    </style:style>
    <style:style style:name="P314" style:parent-style-name="Textbody" style:list-style-name="LFO35" style:family="paragraph">
      <style:text-properties style:font-name="Aptos Narrow" style:font-name-complex="Arial" style:language-complex="he" style:country-complex="IL"/>
    </style:style>
    <style:style style:name="P315" style:parent-style-name="Textbody" style:list-style-name="LFO35" style:family="paragraph">
      <style:text-properties style:font-name="Aptos Narrow" style:font-name-complex="Arial" style:language-complex="he" style:country-complex="IL"/>
    </style:style>
    <style:style style:name="P316" style:parent-style-name="Textbody" style:list-style-name="LFO35" style:family="paragraph">
      <style:text-properties style:font-name="Aptos Narrow" style:font-name-complex="Arial" style:language-complex="he" style:country-complex="IL"/>
    </style:style>
    <style:style style:name="P317" style:parent-style-name="Textbody" style:list-style-name="LFO35" style:family="paragraph">
      <style:text-properties style:font-name="Aptos Narrow" style:font-name-complex="Arial" style:language-complex="he" style:country-complex="IL"/>
    </style:style>
    <style:style style:name="P318" style:parent-style-name="Textbody" style:family="paragraph">
      <style:text-properties style:font-name="Aptos Narrow" style:font-name-complex="Arial" style:language-complex="he" style:country-complex="IL"/>
    </style:style>
    <style:style style:name="T319" style:parent-style-name="DefaultParagraphFont" style:family="text">
      <style:text-properties style:font-name="Aptos Narrow" style:font-name-complex="Arial" style:language-complex="he" style:country-complex="IL"/>
    </style:style>
    <style:style style:name="P320" style:parent-style-name="Textbody" style:family="paragraph">
      <style:text-properties style:font-name="Aptos Narrow" style:font-name-complex="Arial" fo:font-weight="bold" style:font-weight-asian="bold" style:font-weight-complex="bold" style:language-complex="he" style:country-complex="IL"/>
    </style:style>
    <style:style style:name="P321" style:parent-style-name="Textbody" style:family="paragraph">
      <style:text-properties style:font-name="Aptos Narrow" style:font-name-complex="Arial" style:language-complex="he" style:country-complex="IL"/>
    </style:style>
    <style:style style:name="P322" style:parent-style-name="Textbody" style:family="paragraph">
      <style:text-properties style:font-name="Aptos Narrow" style:font-name-complex="Arial" style:language-complex="he" style:country-complex="IL"/>
    </style:style>
    <style:style style:name="P323" style:parent-style-name="Textbody" style:list-style-name="LFO36" style:family="paragraph">
      <style:text-properties style:font-name="Aptos Narrow" style:font-name-complex="Arial" style:language-complex="he" style:country-complex="IL"/>
    </style:style>
    <style:style style:name="P324" style:parent-style-name="Textbody" style:list-style-name="LFO36" style:family="paragraph">
      <style:text-properties style:font-name="Aptos Narrow" style:font-name-complex="Arial" style:language-complex="he" style:country-complex="IL"/>
    </style:style>
    <style:style style:name="P325" style:parent-style-name="Textbody" style:list-style-name="LFO36" style:family="paragraph">
      <style:text-properties style:font-name="Aptos Narrow" style:font-name-complex="Arial" style:language-complex="he" style:country-complex="IL"/>
    </style:style>
    <style:style style:name="P326" style:parent-style-name="Textbody" style:family="paragraph">
      <style:text-properties style:font-name="Aptos Narrow" style:font-name-complex="Arial" style:language-complex="he" style:country-complex="IL"/>
    </style:style>
    <style:style style:name="P327" style:parent-style-name="Textbody" style:family="paragraph">
      <style:text-properties style:font-name="Aptos Narrow" style:font-name-complex="Arial" style:language-complex="he" style:country-complex="IL"/>
    </style:style>
    <style:style style:name="P328" style:parent-style-name="Textbody" style:family="paragraph">
      <style:text-properties style:font-name="Aptos Narrow" style:font-name-complex="Arial" style:language-complex="he" style:country-complex="IL"/>
    </style:style>
    <style:style style:name="P329" style:parent-style-name="Normal" style:family="paragraph">
      <style:text-properties style:font-name-complex="Arial" style:language-complex="he" style:country-complex="IL"/>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General Topics Overview</text:p>
      <text:list text:style-name="LFO1" text:continue-numbering="true">
        <text:list-item>
          <text:p text:style-name="P4">Introduction to the CI/CD World</text:p>
        </text:list-item>
        <text:list-item>
          <text:p text:style-name="P5">Introduction to GitHub Actions</text:p>
        </text:list-item>
        <text:list-item>
          <text:p text:style-name="P6">Workflows, Events, and Runners</text:p>
        </text:list-item>
        <text:list-item>
          <text:p text:style-name="P7">Working with YAML and Building Pipelines</text:p>
        </text:list-item>
        <text:list-item>
          <text:p text:style-name="P8">Automated Build Processes</text:p>
        </text:list-item>
        <text:list-item>
          <text:p text:style-name="P9">Integrating Docker into CI/CD</text:p>
        </text:list-item>
        <text:list-item>
          <text:p text:style-name="P10">Working with Secrets and Environment Variables</text:p>
        </text:list-item>
        <text:list-item>
          <text:p text:style-name="P11">Automated Deployments</text:p>
        </text:list-item>
        <text:list-item>
          <text:p text:style-name="P12">Working with Cloud Providers</text:p>
        </text:list-item>
        <text:list-item>
          <text:p text:style-name="P13">Monitoring, Logs, and Debugging</text:p>
        </text:list-item>
        <text:list-item>
          <text:p text:style-name="P14">CI/CD Best Practices and Modern Architecture</text:p>
        </text:list-item>
      </text:list>
      <text:p text:style-name="P15"/>
      <text:p text:style-name="P16">Introduction to the CI/CD World</text:p>
      <text:p text:style-name="P17">Based on Presentation 8.1</text:p>
      <text:p text:style-name="P18"/>
      <text:list text:style-name="LFO23" text:continue-numbering="true">
        <text:list-item>
          <text:p text:style-name="P19">Moving from Manual Work to Automation</text:p>
        </text:list-item>
      </text:list>
      <text:p text:style-name="P20">Explain that in modern environments applications are constantly changing, developers work simultaneously, and new code is pushed to GitHub every few minutes. In this reality it is no longer possible to rely on manual work or local builds on a developer laptop because every developer works with a different environment, different versions, and different dependencies. The goal is to help students understand why organizations need a centralized and consistent process that can pull the latest code, perform builds, run tests, and verify that the system can actually work correctly.</text:p>
      <text:p text:style-name="P21">Things the central server should know how to do:</text:p>
      <text:list text:style-name="LFO2" text:continue-numbering="true">
        <text:list-item>
          <text:p text:style-name="P22">Pull code automatically</text:p>
        </text:list-item>
        <text:list-item>
          <text:p text:style-name="P23">Run builds</text:p>
        </text:list-item>
        <text:list-item>
          <text:p text:style-name="P24">Execute tests</text:p>
        </text:list-item>
        <text:list-item>
          <text:p text:style-name="P25">Create Docker images</text:p>
        </text:list-item>
        <text:list-item>
          <text:p text:style-name="P26">Store secrets and passwords</text:p>
        </text:list-item>
        <text:list-item>
          <text:p text:style-name="P27">Perform deployments</text:p>
        </text:list-item>
        <text:list-item>
          <text:p text:style-name="P28">Work consistently without human dependency</text:p>
        </text:list-item>
      </text:list>
      <text:p text:style-name="P29">The main point is that the goal of DevOps is to reduce as many manual operations as possible and move them into stable, fast, and reliable automation.</text:p>
      <text:p text:style-name="Textbody"><text:span text:style-name="T30"><draw:custom-shape svg:x="0in" svg:y="0in" svg:width="45.51042in" svg:height="0.00139in" draw:z-index="0" draw:id="id0" draw:style-name="a0" draw:name="Horizontal Line 977" text:anchor-type="as-char"><svg:title/><svg:desc/><draw:enhanced-geometry draw:type="non-primitive" svg:viewBox="0 0 21600 21600" draw:enhanced-path="M 0 0 L 21600 0 21600 21600 0 21600 Z N"/></draw:custom-shape></text:span></text:p>
      <text:list text:style-name="LFO23" text:continue-numbering="true">
        <text:list-item>
          <text:p text:style-name="P31">Why Manual Processes No Longer Work</text:p>
        </text:list-item>
      </text:list>
      <text:p text:style-name="P32">Explain why manual processes are no longer suitable for modern systems. In the past, build and deployment processes were done manually, which consumed a lot of time and created many human errors. A single forgotten command or incorrect version could break the entire production environment.</text:p>
      <text:p text:style-name="P33">Examples of a manual process:</text:p>
      <text:list text:style-name="LFO3" text:continue-numbering="true">
        <text:list-item>
          <text:p text:style-name="P34">Developer pushes code to GitHub</text:p>
        </text:list-item>
        <text:list-item>
          <text:p text:style-name="P35">Files are copied manually to a server</text:p>
        </text:list-item>
        <text:list-item>
          <text:p text:style-name="P36">Build is executed manually</text:p>
        </text:list-item>
        <text:list-item>
          <text:p text:style-name="P37">Files are uploaded manually to a testing server</text:p>
        </text:list-item>
        <text:list-item>
          <text:p text:style-name="P38">QA checks are performed manually</text:p>
        </text:list-item>
        <text:list-item>
          <text:p text:style-name="P39">Deployment to Production is done manually</text:p>
        </text:list-item>
      </text:list>
      <text:p text:style-name="P40"/>
      <text:p text:style-name="P41"/>
      <text:p text:style-name="P42">Emphasize that this process is:</text:p>
      <text:list text:style-name="LFO4" text:continue-numbering="true">
        <text:list-item>
          <text:p text:style-name="P43">Slow</text:p>
        </text:list-item>
        <text:list-item>
          <text:p text:style-name="P44">Unstable</text:p>
        </text:list-item>
        <text:list-item>
          <text:p text:style-name="P45">Not scalable</text:p>
        </text:list-item>
        <text:list-item>
          <text:p text:style-name="P46">Highly dependent on people</text:p>
        </text:list-item>
      </text:list>
      <text:p text:style-name="Textbody"><text:span text:style-name="T47"><draw:custom-shape svg:x="0in" svg:y="0in" svg:width="45.51042in" svg:height="0.00139in" draw:z-index="0" draw:id="id1" draw:style-name="a1" draw:name="Horizontal Line 978" text:anchor-type="as-char"><svg:title/><svg:desc/><draw:enhanced-geometry draw:type="non-primitive" svg:viewBox="0 0 21600 21600" draw:enhanced-path="M 0 0 L 21600 0 21600 21600 0 21600 Z N"/></draw:custom-shape></text:span></text:p>
      <text:list text:style-name="LFO23" text:continue-numbering="true">
        <text:list-item>
          <text:p text:style-name="P48">The Importance of Automated Testing</text:p>
        </text:list-item>
      </text:list>
      <text:p text:style-name="P49">Explain the importance of automated testing before every deployment. In modern environments it is impossible to rely on someone remembering to test the system manually. Once code is pushed, the system should automatically verify that everything still works correctly before moving to the next stages.</text:p>
      <text:p text:style-name="P50">Basic flow:</text:p>
      <text:list text:style-name="LFO5" text:continue-numbering="true">
        <text:list-item>
          <text:p text:style-name="P51">Developer pushes code</text:p>
        </text:list-item>
        <text:list-item>
          <text:p text:style-name="P52">Build process starts</text:p>
        </text:list-item>
        <text:list-item>
          <text:p text:style-name="P53">Automated tests run</text:p>
        </text:list-item>
        <text:list-item>
          <text:p text:style-name="P54">If something fails — the process stops</text:p>
        </text:list-item>
        <text:list-item>
          <text:p text:style-name="P55">If everything passes — deployment continues</text:p>
        </text:list-item>
      </text:list>
      <text:p text:style-name="P56">The goal is to prevent broken code from reaching Production.</text:p>
      <text:p text:style-name="Textbody"><text:span text:style-name="T57"><draw:custom-shape svg:x="0in" svg:y="0in" svg:width="45.51042in" svg:height="0.00139in" draw:z-index="0" draw:id="id2" draw:style-name="a2" draw:name="Horizontal Line 988" text:anchor-type="as-char"><svg:title/><svg:desc/><draw:enhanced-geometry draw:type="non-primitive" svg:viewBox="0 0 21600 21600" draw:enhanced-path="M 0 0 L 21600 0 21600 21600 0 21600 Z N"/></draw:custom-shape></text:span></text:p>
      <text:list text:style-name="LFO23" text:continue-numbering="true">
        <text:list-item>
          <text:p text:style-name="P58"><text:span text:style-name="T59">Initial Introduction to CI/CD</text:span></text:p>
        </text:list-item>
      </text:list>
      <text:p text:style-name="P60">Introduce the concepts of CI/CD in a simple way without going too deep technically. Explain that CI (Continuous Integration) is the process where every code change is automatically tested and built, while CD (Continuous Delivery / Deployment) is the stage where the system automatically deploys changes into different environments.</text:p>
      <text:p text:style-name="P61">It is important to connect students to real-world scenarios and explain that modern systems usually contain multiple workflows, where each workflow is responsible for a different task inside the automation pipeline.</text:p>
      <text:p text:style-name="P62">Examples of common workflows:</text:p>
      <text:list text:style-name="LFO6" text:continue-numbering="true">
        <text:list-item>
          <text:p text:style-name="P63">Workflow that runs tests when a Pull Request is opened</text:p>
        </text:list-item>
        <text:list-item>
          <text:p text:style-name="P64">Workflow that performs a build after a push to main</text:p>
        </text:list-item>
        <text:list-item>
          <text:p text:style-name="P65">Workflow that creates and pushes a Docker image to a registry</text:p>
        </text:list-item>
        <text:list-item>
          <text:p text:style-name="P66">Workflow that performs automatic deployment to Production</text:p>
        </text:list-item>
        <text:list-item>
          <text:p text:style-name="P67">Workflow that runs nightly backups or security scans</text:p>
        </text:list-item>
      </text:list>
      <text:p text:style-name="P68">The main idea is understanding that the entire process works automatically without depending on human interaction.</text:p>
      <text:p text:style-name="Textbody"><text:span text:style-name="T69"><draw:custom-shape svg:x="0in" svg:y="0in" svg:width="45.51042in" svg:height="0.00139in" draw:z-index="0" draw:id="id3" draw:style-name="a3" draw:name="Horizontal Line 979" text:anchor-type="as-char"><svg:title/><svg:desc/><draw:enhanced-geometry draw:type="non-primitive" svg:viewBox="0 0 21600 21600" draw:enhanced-path="M 0 0 L 21600 0 21600 21600 0 21600 Z N"/></draw:custom-shape></text:span></text:p>
      <text:list text:style-name="LFO23" text:continue-numbering="true">
        <text:list-item>
          <text:p text:style-name="P70">Introduction to Common CI/CD Tools</text:p>
        </text:list-item>
      </text:list>
      <text:p text:style-name="P71">Present the main CI/CD tools in a high-level way and explain that all of them work around the same idea — detecting code changes, running pipelines, performing builds, running tests, and eventually deploying automatically.</text:p>
      <text:p text:style-name="P72">Main tools:</text:p>
      <text:list text:style-name="LFO7" text:continue-numbering="true">
        <text:list-item>
          <text:p text:style-name="P73">Jenkins</text:p>
        </text:list-item>
        <text:list-item>
          <text:p text:style-name="P74">GitHub Actions</text:p>
        </text:list-item>
        <text:list-item>
          <text:p text:style-name="P75">GitLab CI/CD</text:p>
        </text:list-item>
      </text:list>
      <text:p text:style-name="P76">Explain that the course will mainly focus on GitHub Actions because of its simplicity and native integration with GitHub.</text:p>
      <text:p text:style-name="Textbody"><text:span text:style-name="T77"><draw:custom-shape svg:x="0in" svg:y="0in" svg:width="45.51042in" svg:height="0.00139in" draw:z-index="0" draw:id="id4" draw:style-name="a4" draw:name="Horizontal Line 980" text:anchor-type="as-char"><svg:title/><svg:desc/><draw:enhanced-geometry draw:type="non-primitive" svg:viewBox="0 0 21600 21600" draw:enhanced-path="M 0 0 L 21600 0 21600 21600 0 21600 Z N"/></draw:custom-shape></text:span></text:p>
      <text:list text:style-name="LFO23" text:continue-numbering="true">
        <text:list-item>
          <text:p text:style-name="P78">The Big Picture – How a Modern System Works</text:p>
        </text:list-item>
      </text:list>
      <text:p text:style-name="P79">Present the big picture of a modern infrastructure and explain how all components connect together into one automated process.</text:p>
      <text:p text:style-name="P80">General flow:</text:p>
      <text:list text:style-name="LFO8" text:continue-numbering="true">
        <text:list-item>
          <text:p text:style-name="P81">Developers push code to GitHub</text:p>
        </text:list-item>
        <text:list-item>
          <text:p text:style-name="P82">CI/CD pipeline is triggered</text:p>
        </text:list-item>
        <text:list-item>
          <text:p text:style-name="P83">Build process starts</text:p>
        </text:list-item>
        <text:list-item>
          <text:p text:style-name="P84">Docker image is created</text:p>
        </text:list-item>
        <text:list-item>
          <text:p text:style-name="P85">Automated tests run</text:p>
        </text:list-item>
        <text:list-item>
          <text:p text:style-name="P86">Deployment to testing environment</text:p>
        </text:list-item>
        <text:list-item>
          <text:p text:style-name="P87">After approval — deployment to Production</text:p>
        </text:list-item>
        <text:list-item>
          <text:p text:style-name="P88">Kubernetes runs the containers</text:p>
        </text:list-item>
        <text:list-item>
          <text:p text:style-name="P89">Monitoring systems track the environment</text:p>
        </text:list-item>
      </text:list>
      <text:p text:style-name="P90">The goal is to demonstrate that this entire chain can work automatically from start to finish.</text:p>
      <text:p text:style-name="P91"/>
      <text:p text:style-name="P92"/>
      <text:list text:style-name="LFO23" text:continue-numbering="true">
        <text:list-item>
          <text:p text:style-name="P93">DevOps as a Culture</text:p>
        </text:list-item>
      </text:list>
      <text:p text:style-name="P94">Conclude by explaining that DevOps is not only about tools, but about an entire culture focused on creating faster, more stable, and more automated collaboration between development, infrastructure, and QA teams.</text:p>
      <text:p text:style-name="P95">Main concepts:</text:p>
      <text:list text:style-name="LFO9" text:continue-numbering="true">
        <text:list-item>
          <text:p text:style-name="P96">Automation</text:p>
        </text:list-item>
        <text:list-item>
          <text:p text:style-name="P97">Collaboration</text:p>
        </text:list-item>
        <text:list-item>
          <text:p text:style-name="P98">CI/CD</text:p>
        </text:list-item>
        <text:list-item>
          <text:p text:style-name="P99">Monitoring</text:p>
        </text:list-item>
        <text:list-item>
          <text:p text:style-name="P100">Fast and continuous delivery</text:p>
        </text:list-item>
        <text:list-item>
          <text:p text:style-name="P101">Reducing human errors</text:p>
        </text:list-item>
      </text:list>
      <text:p text:style-name="P102">Finish with the message that CI/CD is one of the main foundations that enables modern DevOps practices to work efficiently.</text:p>
      <text:p text:style-name="P103"/>
      <text:p text:style-name="P104">Continuation of the CI/CD Module Lesson Plan</text:p>
      <text:p text:style-name="P105">Based on Presentation 8.2</text:p>
      <text:list text:style-name="LFO3" text:continue-numbering="true">
        <text:list-item>
          <text:list>
            <text:list-item>
              <text:list>
                <text:list-item>
                  <text:p text:style-name="Style1"><text:s/>Introduction to GitHub Actions</text:p>
                </text:list-item>
              </text:list>
            </text:list-item>
            <text:list-item>
              <text:p text:style-name="P106">Understanding the Purpose of GitHub Actions</text:p>
            </text:list-item>
          </text:list>
        </text:list-item>
      </text:list>
      <text:p text:style-name="P107">Explain that GitHub Actions is GitHub’s built-in automation platform that allows us to automate development and DevOps processes directly from the repository itself. The goal at this stage is not to go too deep technically, but to help students understand that GitHub can react to events and automatically execute operations.</text:p>
      <text:p text:style-name="P108">Examples of common operations:</text:p>
      <text:list text:style-name="LFO10" text:continue-numbering="true">
        <text:list-item>
          <text:p text:style-name="P109">Running automated tests</text:p>
        </text:list-item>
        <text:list-item>
          <text:p text:style-name="P110">Building applications</text:p>
        </text:list-item>
        <text:list-item>
          <text:p text:style-name="P111">Creating Docker images</text:p>
        </text:list-item>
        <text:list-item>
          <text:p text:style-name="P112">Deploying applications</text:p>
        </text:list-item>
        <text:list-item>
          <text:p text:style-name="P113">Running scheduled automations</text:p>
        </text:list-item>
        <text:list-item>
          <text:p text:style-name="P114">Triggering workflows after Pull Requests or Push events</text:p>
        </text:list-item>
      </text:list>
      <text:p text:style-name="P115">Emphasize that modern DevOps environments rely heavily on event-driven automation.</text:p>
      <text:p text:style-name="Textbody"><text:span text:style-name="T116"><draw:custom-shape svg:x="0in" svg:y="0in" svg:width="45.51042in" svg:height="0.00139in" draw:z-index="0" draw:id="id5" draw:style-name="a5" draw:name="Horizontal Line 981" text:anchor-type="as-char"><svg:title/><svg:desc/><draw:enhanced-geometry draw:type="non-primitive" svg:viewBox="0 0 21600 21600" draw:enhanced-path="M 0 0 L 21600 0 21600 21600 0 21600 Z N"/></draw:custom-shape></text:span></text:p>
      <text:list text:style-name="LFO3" text:continue-numbering="true">
        <text:list-item>
          <text:list>
            <text:list-item>
              <text:p text:style-name="P117">High-Level Understanding of the GitHub Actions Architecture</text:p>
            </text:list-item>
          </text:list>
        </text:list-item>
      </text:list>
      <text:p text:style-name="P118">Introduce the basic hierarchy of GitHub Actions in a simple and visual way.</text:p>
      <text:p text:style-name="P119">Explain the relationship between:</text:p>
      <text:list text:style-name="LFO11" text:continue-numbering="true">
        <text:list-item>
          <text:p text:style-name="P120">Workflow</text:p>
        </text:list-item>
        <text:list-item>
          <text:p text:style-name="P121">Job</text:p>
        </text:list-item>
        <text:list-item>
          <text:p text:style-name="P122">Step</text:p>
        </text:list-item>
        <text:list-item>
          <text:p text:style-name="P123">Runner</text:p>
        </text:list-item>
      </text:list>
      <text:p text:style-name="P124">The goal is not to memorize syntax yet, but to understand the execution flow.</text:p>
      <text:p text:style-name="P125">Basic explanation:</text:p>
      <text:list text:style-name="LFO12" text:continue-numbering="true">
        <text:list-item>
          <text:p text:style-name="P126">Workflow = the full automation process</text:p>
        </text:list-item>
        <text:list-item>
          <text:p text:style-name="P127">Job = a group of operations running together</text:p>
        </text:list-item>
        <text:list-item>
          <text:p text:style-name="P128">Step = a single action or command</text:p>
        </text:list-item>
        <text:list-item>
          <text:p text:style-name="P129">Runner = the machine that executes the workflow</text:p>
        </text:list-item>
      </text:list>
      <text:p text:style-name="P130">Emphasize that GitHub Actions eventually executes regular commands on a machine, and the YAML file simply defines what should happen and when.</text:p>
      <text:p text:style-name="P131"/>
      <text:list text:style-name="LFO3" text:continue-numbering="true">
        <text:list-item>
          <text:list>
            <text:list-item>
              <text:p text:style-name="P132">Understanding Events and Workflow Triggers</text:p>
            </text:list-item>
          </text:list>
        </text:list-item>
      </text:list>
      <text:p text:style-name="P133">Explain that workflows do not run randomly. Every workflow listens to specific events inside GitHub.</text:p>
      <text:p text:style-name="P134">Common trigger examples:</text:p>
      <text:list text:style-name="LFO13" text:continue-numbering="true">
        <text:list-item>
          <text:p text:style-name="P135">push</text:p>
        </text:list-item>
        <text:list-item>
          <text:p text:style-name="P136">pull_request</text:p>
        </text:list-item>
        <text:list-item>
          <text:p text:style-name="P137">workflow_dispatch</text:p>
        </text:list-item>
        <text:list-item>
          <text:p text:style-name="P138">schedule</text:p>
        </text:list-item>
      </text:list>
      <text:p text:style-name="P139">Explain that once the defined event occurs, GitHub scans the repository, detects the workflow file inside .github/workflows, and starts the automation process automatically.</text:p>
      <text:p text:style-name="Textbody"><text:span text:style-name="T140"><draw:custom-shape svg:x="0in" svg:y="0in" svg:width="45.51042in" svg:height="0.00139in" draw:z-index="0" draw:id="id6" draw:style-name="a6" draw:name="Horizontal Line 982" text:anchor-type="as-char"><svg:title/><svg:desc/><draw:enhanced-geometry draw:type="non-primitive" svg:viewBox="0 0 21600 21600" draw:enhanced-path="M 0 0 L 21600 0 21600 21600 0 21600 Z N"/></draw:custom-shape></text:span></text:p>
      <text:list text:style-name="LFO3" text:continue-numbering="true">
        <text:list-item>
          <text:list>
            <text:list-item>
              <text:p text:style-name="P141">Short Introduction to GitHub Actions Pricing</text:p>
            </text:list-item>
          </text:list>
        </text:list-item>
      </text:list>
      <text:p text:style-name="P142">Briefly mention that GitHub Actions is free for public repositories and includes limited free usage for private repositories. Explain that organizations usually pay based on runner minutes and storage usage.</text:p>
      <text:p text:style-name="P143">There is no need to go deep into billing at this stage.</text:p>
      <text:p text:style-name="Textbody"><text:span text:style-name="T144"><draw:custom-shape svg:x="0.78403in" svg:y="5.84028in" svg:width="6.69583in" svg:height="0.08819in" draw:z-index="0" draw:id="id7" draw:style-name="a7" draw:name="Horizontal Line 987" text:anchor-type="as-char"><svg:title/><svg:desc/><draw:enhanced-geometry draw:type="non-primitive" svg:viewBox="0 0 21600 21600" draw:enhanced-path="M 0 0 L 21600 0 21600 21600 0 21600 Z N"/></draw:custom-shape></text:span></text:p>
      <text:list text:style-name="LFO12" text:continue-numbering="true">
        <text:list-item>
          <text:list>
            <text:list-item>
              <text:p text:style-name="P145">First Practical Demonstration – Creating the First Workflow</text:p>
            </text:list-item>
          </text:list>
        </text:list-item>
      </text:list>
      <text:list text:style-name="LFO22" text:continue-numbering="true">
        <text:list-item>
          <text:p text:style-name="P146">Creating a Basic Repository from the GitHub UI</text:p>
        </text:list-item>
      </text:list>
      <text:p text:style-name="P147">Start the first live demonstration directly from GitHub without using an IDE yet. The purpose is to simplify the first interaction and show students that GitHub Actions can initially be managed entirely from the browser.</text:p>
      <text:p text:style-name="P148">Repository setup:</text:p>
      <text:list text:style-name="LFO14" text:continue-numbering="true">
        <text:list-item>
          <text:p text:style-name="P149">Create a new public repository</text:p>
        </text:list-item>
        <text:list-item>
          <text:p text:style-name="P150">Initialize with README</text:p>
        </text:list-item>
        <text:list-item>
          <text:p text:style-name="P151">Suggested name: gh-first-action</text:p>
        </text:list-item>
      </text:list>
      <text:p text:style-name="P152">Explain that at this stage there is intentionally no local project yet.</text:p>
      <text:p text:style-name="P153"><text:span text:style-name="T154"><draw:custom-shape svg:x="0in" svg:y="0in" svg:width="45.51042in" svg:height="0.00139in" draw:z-index="0" draw:id="id8" draw:style-name="a8" draw:name="Horizontal Line 983" text:anchor-type="as-char"><svg:title/><svg:desc/><draw:enhanced-geometry draw:type="non-primitive" svg:viewBox="0 0 21600 21600" draw:enhanced-path="M 0 0 L 21600 0 21600 21600 0 21600 Z N"/></draw:custom-shape></text:span></text:p>
      <text:p text:style-name="P155"/>
      <text:list text:style-name="LFO22" text:continue-numbering="true">
        <text:list-item>
          <text:p text:style-name="P156">Creating the First Workflow from the Actions Tab</text:p>
        </text:list-item>
      </text:list>
      <text:p text:style-name="P157">Move into the Actions tab and explain that this is the central place where GitHub manages automation processes.</text:p>
      <text:p text:style-name="P158">Demonstrate:</text:p>
      <text:list text:style-name="LFO15" text:continue-numbering="true">
        <text:list-item>
          <text:p text:style-name="P159">Creating a new workflow</text:p>
        </text:list-item>
        <text:list-item>
          <text:p text:style-name="P160">Selecting “Set up a workflow yourself”</text:p>
        </text:list-item>
        <text:list-item>
          <text:p text:style-name="P161">Creating the YAML file directly from the browser</text:p>
        </text:list-item>
      </text:list>
      <text:p text:style-name="P162">Explain that GitHub only recognizes workflow files located under:</text:p>
      <text:p text:style-name="P163">.github/workflows/</text:p>
      <text:p text:style-name="P164">Emphasize that workflows are simply YAML configuration files stored inside the repository like any other file.</text:p>
      <text:p text:style-name="Textbody"><text:span text:style-name="T165"><draw:custom-shape svg:x="0in" svg:y="0in" svg:width="45.51042in" svg:height="0.00139in" draw:z-index="0" draw:id="id9" draw:style-name="a9" draw:name="Horizontal Line 984" text:anchor-type="as-char"><svg:title/><svg:desc/><draw:enhanced-geometry draw:type="non-primitive" svg:viewBox="0 0 21600 21600" draw:enhanced-path="M 0 0 L 21600 0 21600 21600 0 21600 Z N"/></draw:custom-shape></text:span></text:p>
      <text:list text:style-name="LFO22" text:continue-numbering="true">
        <text:list-item>
          <text:p text:style-name="P166">Writing the First Basic Workflow</text:p>
        </text:list-item>
      </text:list>
      <text:p text:style-name="P167">Create the first minimal workflow together with the students.</text:p>
      <text:p text:style-name="P168">The workflow should:</text:p>
      <text:list text:style-name="LFO16" text:continue-numbering="true">
        <text:list-item>
          <text:p text:style-name="P169">Run manually using workflow_dispatch</text:p>
        </text:list-item>
        <text:list-item>
          <text:p text:style-name="P170">Contain one job</text:p>
        </text:list-item>
        <text:list-item>
          <text:p text:style-name="P171">Run on ubuntu-latest</text:p>
        </text:list-item>
        <text:list-item>
          <text:p text:style-name="P172">Execute simple echo commands</text:p>
        </text:list-item>
      </text:list>
      <text:p text:style-name="P173">Explain the workflow section by section:</text:p>
      <text:list text:style-name="LFO17" text:continue-numbering="true">
        <text:list-item>
          <text:p text:style-name="P174">name</text:p>
        </text:list-item>
        <text:list-item>
          <text:p text:style-name="P175">on</text:p>
        </text:list-item>
        <text:list-item>
          <text:p text:style-name="P176">jobs</text:p>
        </text:list-item>
        <text:list-item>
          <text:p text:style-name="P177">runs-on</text:p>
        </text:list-item>
        <text:list-item>
          <text:p text:style-name="P178">steps</text:p>
        </text:list-item>
        <text:list-item>
          <text:p text:style-name="P179">run</text:p>
        </text:list-item>
      </text:list>
      <text:p text:style-name="P180">The goal is to remove the fear from YAML files and help students understand that GitHub Actions is mostly configuration that executes shell commands.</text:p>
      <text:p text:style-name="Textbody"><text:span text:style-name="T181"><draw:custom-shape svg:x="0in" svg:y="0in" svg:width="45.51042in" svg:height="0.00139in" draw:z-index="0" draw:id="id10" draw:style-name="a10" draw:name="Horizontal Line 985" text:anchor-type="as-char"><svg:title/><svg:desc/><draw:enhanced-geometry draw:type="non-primitive" svg:viewBox="0 0 21600 21600" draw:enhanced-path="M 0 0 L 21600 0 21600 21600 0 21600 Z N"/></draw:custom-shape></text:span></text:p>
      <text:p text:style-name="P182"/>
      <text:list text:style-name="LFO22" text:continue-numbering="true">
        <text:list-item>
          <text:p text:style-name="P183">Executing and Monitoring the Workflow</text:p>
        </text:list-item>
      </text:list>
      <text:p text:style-name="P184">After committing the workflow, move back to the Actions tab and demonstrate how GitHub automatically detects the workflow.</text:p>
      <text:p text:style-name="P185">Demonstrate:</text:p>
      <text:list text:style-name="LFO18" text:continue-numbering="true">
        <text:list-item>
          <text:p text:style-name="P186">Running the workflow manually</text:p>
        </text:list-item>
        <text:list-item>
          <text:p text:style-name="P187">Viewing execution status</text:p>
        </text:list-item>
        <text:list-item>
          <text:p text:style-name="P188">Opening the job logs</text:p>
        </text:list-item>
        <text:list-item>
          <text:p text:style-name="P189">Viewing the output of every step</text:p>
        </text:list-item>
      </text:list>
      <text:p text:style-name="P190">Explain that this is one of the most important concepts in CI/CD environments — visibility and observability of automation processes.</text:p>
      <text:p text:style-name="P191">Students should understand that:</text:p>
      <text:list text:style-name="LFO19" text:continue-numbering="true">
        <text:list-item>
          <text:p text:style-name="P192">Every step produces logs</text:p>
        </text:list-item>
        <text:list-item>
          <text:p text:style-name="P193">Every command can succeed or fail</text:p>
        </text:list-item>
        <text:list-item>
          <text:p text:style-name="P194">GitHub provides full visibility into the execution process</text:p>
        </text:list-item>
      </text:list>
      <text:p text:style-name="Textbody"><text:span text:style-name="T195"><draw:custom-shape svg:x="0in" svg:y="0in" svg:width="45.51042in" svg:height="0.00139in" draw:z-index="0" draw:id="id11" draw:style-name="a11" draw:name="Horizontal Line 986" text:anchor-type="as-char"><svg:title/><svg:desc/><draw:enhanced-geometry draw:type="non-primitive" svg:viewBox="0 0 21600 21600" draw:enhanced-path="M 0 0 L 21600 0 21600 21600 0 21600 Z N"/></draw:custom-shape></text:span></text:p>
      <text:list text:style-name="LFO22" text:continue-numbering="true">
        <text:list-item>
          <text:p text:style-name="P196">Cloning the Repository Locally</text:p>
        </text:list-item>
      </text:list>
      <text:p text:style-name="P197">After the workflow successfully runs, perform a clone of the repository to the local machine and open it in VS Code.</text:p>
      <text:p text:style-name="P198">The goal here is extremely important:</text:p>
      <text:p text:style-name="P199">Students need to understand that GitHub Actions workflows are simply regular YAML files stored inside the repository.</text:p>
      <text:p text:style-name="P200">Show the students the actual structure:</text:p>
      <text:p text:style-name="P201">.github/<text:line-break/>└── workflows/<text:line-break/>└── first-action.yml</text:p>
      <text:p text:style-name="P202">Emphasize:</text:p>
      <text:list text:style-name="LFO20" text:continue-numbering="true">
        <text:list-item>
          <text:p text:style-name="P203">GitHub Actions is not “magic”</text:p>
        </text:list-item>
        <text:list-item>
          <text:p text:style-name="P204">GitHub scans the repository for YAML files</text:p>
        </text:list-item>
        <text:list-item>
          <text:p text:style-name="P205">The workflows are version controlled like any other file</text:p>
        </text:list-item>
        <text:list-item>
          <text:p text:style-name="P206">Everything eventually becomes configuration + shell commands</text:p>
        </text:list-item>
      </text:list>
      <text:p text:style-name="P207">This is one of the most important mindset moments in the entire introduction section.</text:p>
      <text:p text:style-name="P208"/>
      <text:list text:style-name="LFO22" text:continue-numbering="true">
        <text:list-item>
          <text:p text:style-name="P209">Connecting the Idea to Real DevOps Environments</text:p>
        </text:list-item>
      </text:list>
      <text:p text:style-name="P210">Conclude the practical section by connecting the demonstration to real-world systems.</text:p>
      <text:p text:style-name="P211">Explain that in production environments these workflows become much larger and can include:</text:p>
      <text:list text:style-name="LFO21" text:continue-numbering="true">
        <text:list-item>
          <text:p text:style-name="P212">Running automated tests</text:p>
        </text:list-item>
        <text:list-item>
          <text:p text:style-name="P213">Installing dependencies</text:p>
        </text:list-item>
        <text:list-item>
          <text:p text:style-name="P214">Building React or Node.js applications</text:p>
        </text:list-item>
        <text:list-item>
          <text:p text:style-name="P215">Creating Docker images</text:p>
        </text:list-item>
        <text:list-item>
          <text:p text:style-name="P216">Deploying applications to cloud environments</text:p>
        </text:list-item>
        <text:list-item>
          <text:p text:style-name="P217">Running security scans</text:p>
        </text:list-item>
        <text:list-item>
          <text:p text:style-name="P218">Triggering deployments only after tests succeed</text:p>
        </text:list-item>
      </text:list>
      <text:p text:style-name="P219">The goal is to help students understand that they already built the foundation of a real CI/CD pipeline — even if the current workflow is still very simple.</text:p>
      <text:p text:style-name="P220"/>
      <text:p text:style-name="P221">4. Moving to a Real React Project</text:p>
      <text:p text:style-name="P222">Based on Presentation 8.2 – Slide 31</text:p>
      <text:p text:style-name="P223">A) Transition from Simple Demo to Real Project</text:p>
      <text:p text:style-name="P224">Explain that until now the students worked with a very small workflow whose purpose was mainly understanding the architecture of GitHub Actions. At this stage the goal is to move into a more realistic example that behaves closer to real DevOps environments.</text:p>
      <text:p text:style-name="P225">Introduce a simple React application and explain that from this point the workflows will start interacting with actual project dependencies, tests, and build processes.</text:p>
      <text:p text:style-name="P226">Emphasize that this is the point where CI (Continuous Integration) starts becoming meaningful.</text:p>
      <text:p text:style-name="Textbody"><text:span text:style-name="T227"><draw:custom-shape svg:x="0in" svg:y="0in" svg:width="45.51042in" svg:height="0.00139in" draw:z-index="0" draw:id="id12" draw:style-name="a12" draw:name="Horizontal Line 989" text:anchor-type="as-char"><svg:title/><svg:desc/><draw:enhanced-geometry draw:type="non-primitive" svg:viewBox="0 0 21600 21600" draw:enhanced-path="M 0 0 L 21600 0 21600 21600 0 21600 Z N"/></draw:custom-shape></text:span></text:p>
      <text:p text:style-name="P228">B) Introducing the React Project Structure</text:p>
      <text:p text:style-name="P229">Present the example React project and explain that the project already contains:</text:p>
      <text:list text:style-name="LFO24" text:continue-numbering="true">
        <text:list-item>
          <text:p text:style-name="P230">Basic React application</text:p>
        </text:list-item>
        <text:list-item>
          <text:p text:style-name="P231">Standard package.json configuration</text:p>
        </text:list-item>
        <text:list-item>
          <text:p text:style-name="P232">Simple UI components</text:p>
        </text:list-item>
        <text:list-item>
          <text:p text:style-name="P233">Unit tests</text:p>
        </text:list-item>
        <text:list-item>
          <text:p text:style-name="P234">Node.js dependency structure</text:p>
        </text:list-item>
      </text:list>
      <text:p text:style-name="P235">The goal is not to teach React itself, but to use a realistic application as the target for CI/CD processes.</text:p>
      <text:p text:style-name="P236">Explain that in real companies GitHub Actions usually interacts with projects exactly like this.</text:p>
      <text:p text:style-name="Textbody"><text:span text:style-name="T237"><draw:custom-shape svg:x="0in" svg:y="0in" svg:width="45.51042in" svg:height="0.00139in" draw:z-index="0" draw:id="id13" draw:style-name="a13" draw:name="Horizontal Line 990" text:anchor-type="as-char"><svg:title/><svg:desc/><draw:enhanced-geometry draw:type="non-primitive" svg:viewBox="0 0 21600 21600" draw:enhanced-path="M 0 0 L 21600 0 21600 21600 0 21600 Z N"/></draw:custom-shape></text:span></text:p>
      <text:p text:style-name="P238">C) Running the Project Locally</text:p>
      <text:p text:style-name="P239">Run the project locally together with the students before introducing automation.</text:p>
      <text:p text:style-name="P240">Commands demonstrated:</text:p>
      <text:list text:style-name="LFO25" text:continue-numbering="true">
        <text:list-item>
          <text:p text:style-name="P241">npm install</text:p>
        </text:list-item>
        <text:list-item>
          <text:p text:style-name="P242">npm run dev</text:p>
        </text:list-item>
      </text:list>
      <text:p text:style-name="P243">Explain that before automating systems in CI/CD environments, developers first verify that the application works correctly locally.</text:p>
      <text:p text:style-name="P244">Demonstrate:</text:p>
      <text:list text:style-name="LFO26" text:continue-numbering="true">
        <text:list-item>
          <text:p text:style-name="P245">Installing dependencies</text:p>
        </text:list-item>
        <text:list-item>
          <text:p text:style-name="P246">Starting the local development server</text:p>
        </text:list-item>
        <text:list-item>
          <text:p text:style-name="P247">Accessing the application in the browser</text:p>
        </text:list-item>
      </text:list>
      <text:p text:style-name="P248">This stage helps students connect the workflow to an actual working application instead of abstract YAML files.</text:p>
      <text:p text:style-name="Textbody"><text:span text:style-name="T249"><draw:custom-shape svg:x="0in" svg:y="0in" svg:width="45.51042in" svg:height="0.00139in" draw:z-index="0" draw:id="id14" draw:style-name="a14" draw:name="Horizontal Line 991" text:anchor-type="as-char"><svg:title/><svg:desc/><draw:enhanced-geometry draw:type="non-primitive" svg:viewBox="0 0 21600 21600" draw:enhanced-path="M 0 0 L 21600 0 21600 21600 0 21600 Z N"/></draw:custom-shape></text:span></text:p>
      <text:p text:style-name="P250">D) Running the Tests Locally</text:p>
      <text:p text:style-name="P251">Run the tests locally before introducing GitHub Actions automation.</text:p>
      <text:p text:style-name="P252">Command demonstrated:</text:p>
      <text:list text:style-name="LFO27" text:continue-numbering="true">
        <text:list-item>
          <text:p text:style-name="P253">npm test</text:p>
        </text:list-item>
      </text:list>
      <text:p text:style-name="P254">Explain that this is extremely important because GitHub Actions will later execute the exact same commands automatically.</text:p>
      <text:p text:style-name="P255">The students should understand:</text:p>
      <text:list text:style-name="LFO28" text:continue-numbering="true">
        <text:list-item>
          <text:p text:style-name="P256">CI/CD pipelines are mostly automation of commands developers already run manually</text:p>
        </text:list-item>
        <text:list-item>
          <text:p text:style-name="P257">GitHub Actions is not inventing new logic</text:p>
        </text:list-item>
        <text:list-item>
          <text:p text:style-name="P258">The workflow simply executes the same commands on a remote runner</text:p>
        </text:list-item>
      </text:list>
      <text:p text:style-name="P259">This is one of the most important concepts in the entire section.</text:p>
      <text:p text:style-name="Textbody"><text:span text:style-name="T260"><draw:custom-shape svg:x="0in" svg:y="0in" svg:width="45.51042in" svg:height="0.00139in" draw:z-index="0" draw:id="id15" draw:style-name="a15" draw:name="Horizontal Line 992" text:anchor-type="as-char"><svg:title/><svg:desc/><draw:enhanced-geometry draw:type="non-primitive" svg:viewBox="0 0 21600 21600" draw:enhanced-path="M 0 0 L 21600 0 21600 21600 0 21600 Z N"/></draw:custom-shape></text:span></text:p>
      <text:p text:style-name="P261">E) Creating the Workflow Structure Locally</text:p>
      <text:p text:style-name="P262">Move into the project folder and create the GitHub Actions structure manually.</text:p>
      <text:p text:style-name="P263">Required structure:</text:p>
      <text:p text:style-name="P264">.github/workflows/</text:p>
      <text:p text:style-name="P265">Create the first real workflow file:</text:p>
      <text:list text:style-name="LFO29" text:continue-numbering="true">
        <text:list-item>
          <text:p text:style-name="P266">test.yml</text:p>
        </text:list-item>
      </text:list>
      <text:p text:style-name="P267">Explain that GitHub only scans workflow files from this exact location.</text:p>
      <text:p text:style-name="P268">Emphasize again that GitHub Actions workflows are simply YAML configuration files stored inside the repository.</text:p>
      <text:p text:style-name="Textbody"><text:span text:style-name="T269"><draw:custom-shape svg:x="0in" svg:y="0in" svg:width="45.51042in" svg:height="0.00139in" draw:z-index="0" draw:id="id16" draw:style-name="a16" draw:name="Horizontal Line 993" text:anchor-type="as-char"><svg:title/><svg:desc/><draw:enhanced-geometry draw:type="non-primitive" svg:viewBox="0 0 21600 21600" draw:enhanced-path="M 0 0 L 21600 0 21600 21600 0 21600 Z N"/></draw:custom-shape></text:span></text:p>
      <text:p text:style-name="P270">F) Creating the First Real CI Workflow</text:p>
      <text:p text:style-name="P271">Create the first real testing workflow together with the students.</text:p>
      <text:p text:style-name="P272">The workflow should:</text:p>
      <text:list text:style-name="LFO30" text:continue-numbering="true">
        <text:list-item>
          <text:p text:style-name="P273">Trigger on push</text:p>
        </text:list-item>
        <text:list-item>
          <text:p text:style-name="P274">Use ubuntu-latest</text:p>
        </text:list-item>
        <text:list-item>
          <text:p text:style-name="P275">Checkout the repository</text:p>
        </text:list-item>
        <text:list-item>
          <text:p text:style-name="P276">Install Node.js</text:p>
        </text:list-item>
        <text:list-item>
          <text:p text:style-name="P277">Install dependencies</text:p>
        </text:list-item>
        <text:list-item>
          <text:p text:style-name="P278">Run tests</text:p>
        </text:list-item>
      </text:list>
      <text:p text:style-name="P279">Important concepts introduced during this section:</text:p>
      <text:list text:style-name="LFO31" text:continue-numbering="true">
        <text:list-item>
          <text:p text:style-name="P280">actions/checkout</text:p>
        </text:list-item>
        <text:list-item>
          <text:p text:style-name="P281">uses vs run</text:p>
        </text:list-item>
        <text:list-item>
          <text:p text:style-name="P282">npm ci</text:p>
        </text:list-item>
        <text:list-item>
          <text:p text:style-name="P283">npm test</text:p>
        </text:list-item>
      </text:list>
      <text:p text:style-name="P284">Explain that this is already a real Continuous Integration process.</text:p>
      <text:p text:style-name="P285">Every push now automatically verifies that the project still builds and passes tests.</text:p>
      <text:p text:style-name="Textbody"><text:span text:style-name="T286"><draw:custom-shape svg:x="0in" svg:y="0in" svg:width="45.51042in" svg:height="0.00139in" draw:z-index="0" draw:id="id17" draw:style-name="a17" draw:name="Horizontal Line 994" text:anchor-type="as-char"><svg:title/><svg:desc/><draw:enhanced-geometry draw:type="non-primitive" svg:viewBox="0 0 21600 21600" draw:enhanced-path="M 0 0 L 21600 0 21600 21600 0 21600 Z N"/></draw:custom-shape></text:span></text:p>
      <text:p text:style-name="P287">G) Explaining actions/checkout</text:p>
      <text:p text:style-name="P288">Pause and explain one of the most important concepts students usually misunderstand.</text:p>
      <text:p text:style-name="P289">Explain that until now the workflows only executed echo commands, but real workflows require access to the repository code itself.</text:p>
      <text:p text:style-name="P290">This is the role of:</text:p>
      <text:list text:style-name="LFO32" text:continue-numbering="true">
        <text:list-item>
          <text:p text:style-name="P291">actions/checkout</text:p>
        </text:list-item>
      </text:list>
      <text:p text:style-name="P292">Explain:</text:p>
      <text:list text:style-name="LFO33" text:continue-numbering="true">
        <text:list-item>
          <text:p text:style-name="P293">uses = using a reusable GitHub Action</text:p>
        </text:list-item>
        <text:list-item>
          <text:p text:style-name="P294">actions/checkout = official GitHub action for cloning the repository into the runner</text:p>
        </text:list-item>
        <text:list-item>
          <text:p text:style-name="P295">Without checkout the runner does not have the project files</text:p>
        </text:list-item>
      </text:list>
      <text:p text:style-name="P296">This is a critical mindset moment because students begin understanding that workflows execute on temporary remote machines.</text:p>
      <text:p text:style-name="Textbody"><text:span text:style-name="T297"><draw:custom-shape svg:x="0in" svg:y="0in" svg:width="45.51042in" svg:height="0.00139in" draw:z-index="0" draw:id="id18" draw:style-name="a18" draw:name="Horizontal Line 995" text:anchor-type="as-char"><svg:title/><svg:desc/><draw:enhanced-geometry draw:type="non-primitive" svg:viewBox="0 0 21600 21600" draw:enhanced-path="M 0 0 L 21600 0 21600 21600 0 21600 Z N"/></draw:custom-shape></text:span></text:p>
      <text:p text:style-name="P298">H) Executing the Workflow and Viewing the Pipeline</text:p>
      <text:p text:style-name="P299">Commit and push the workflow file to GitHub.</text:p>
      <text:p text:style-name="P300">Demonstrate how the workflow automatically starts after push.</text:p>
      <text:p text:style-name="P301">Inside the Actions tab demonstrate:</text:p>
      <text:list text:style-name="LFO34" text:continue-numbering="true">
        <text:list-item>
          <text:p text:style-name="P302">Repository checkout</text:p>
        </text:list-item>
        <text:list-item>
          <text:p text:style-name="P303">Dependency installation</text:p>
        </text:list-item>
        <text:list-item>
          <text:p text:style-name="P304">Test execution</text:p>
        </text:list-item>
        <text:list-item>
          <text:p text:style-name="P305">Successful workflow completion</text:p>
        </text:list-item>
      </text:list>
      <text:p text:style-name="P306">Explain that students are now watching a real CI pipeline execute automatically.</text:p>
      <text:p text:style-name="Textbody"><text:span text:style-name="T307"><draw:custom-shape svg:x="0in" svg:y="0in" svg:width="45.51042in" svg:height="0.00139in" draw:z-index="0" draw:id="id19" draw:style-name="a19" draw:name="Horizontal Line 996" text:anchor-type="as-char"><svg:title/><svg:desc/><draw:enhanced-geometry draw:type="non-primitive" svg:viewBox="0 0 21600 21600" draw:enhanced-path="M 0 0 L 21600 0 21600 21600 0 21600 Z N"/></draw:custom-shape></text:span></text:p>
      <text:p text:style-name="P308">I) Introducing Workflow Failures</text:p>
      <text:p text:style-name="P309">Intentionally break one of the tests inside the React project.</text:p>
      <text:p text:style-name="P310">The goal is to demonstrate one of the most important ideas in CI/CD:</text:p>
      <text:p text:style-name="P311">A pipeline should fail when the code is broken.</text:p>
      <text:p text:style-name="P312">Demonstrate:</text:p>
      <text:list text:style-name="LFO35" text:continue-numbering="true">
        <text:list-item>
          <text:p text:style-name="P313">Breaking a test</text:p>
        </text:list-item>
        <text:list-item>
          <text:p text:style-name="P314">Running tests locally</text:p>
        </text:list-item>
        <text:list-item>
          <text:p text:style-name="P315">Committing the broken code</text:p>
        </text:list-item>
        <text:list-item>
          <text:p text:style-name="P316">Push triggering the workflow</text:p>
        </text:list-item>
        <text:list-item>
          <text:p text:style-name="P317">Failed workflow inside GitHub Actions</text:p>
        </text:list-item>
      </text:list>
      <text:p text:style-name="P318">Open the logs and explain how developers debug pipeline failures in real environments.</text:p>
      <text:p text:style-name="Textbody"><text:span text:style-name="T319"><draw:custom-shape svg:x="0in" svg:y="0in" svg:width="45.51042in" svg:height="0.00139in" draw:z-index="0" draw:id="id20" draw:style-name="a20" draw:name="Horizontal Line 997" text:anchor-type="as-char"><svg:title/><svg:desc/><draw:enhanced-geometry draw:type="non-primitive" svg:viewBox="0 0 21600 21600" draw:enhanced-path="M 0 0 L 21600 0 21600 21600 0 21600 Z N"/></draw:custom-shape></text:span></text:p>
      <text:p text:style-name="P320">J) Fixing the Failure and Restoring the Pipeline</text:p>
      <text:p text:style-name="P321">Fix the broken test or perform a git revert.</text:p>
      <text:p text:style-name="P322">Demonstrate:</text:p>
      <text:list text:style-name="LFO36" text:continue-numbering="true">
        <text:list-item>
          <text:p text:style-name="P323">Commiting the fix</text:p>
        </text:list-item>
        <text:list-item>
          <text:p text:style-name="P324">Push triggering a new workflow</text:p>
        </text:list-item>
        <text:list-item>
          <text:p text:style-name="P325">Successful pipeline execution</text:p>
        </text:list-item>
      </text:list>
      <text:p text:style-name="P326">Emphasize that CI/CD pipelines become the automatic safety layer of the development process.</text:p>
      <text:p text:style-name="P327">The goal is helping students understand that automation is not only about speed — it is mainly about stability, confidence, and preventing broken code from reaching production.</text:p>
      <text:p text:style-name="P328"/>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Aptos Narrow" svg:font-family="Aptos Narrow"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Style1" style:display-name="Style1" style:family="paragraph" style:parent-style-name="Textbody" style:list-style-name="LFO3">
      <style:text-properties style:font-name="Aptos Narrow" style:font-name-complex="Arial" fo:font-weight="bold" style:font-weight-asian="bold" style:font-weight-complex="bold" style:language-complex="he" style:country-complex="IL" fo:hyphenate="false"/>
    </style:style>
    <style:style style:name="StandardChar" style:display-name="Standard Char" style:family="text" style:parent-style-name="DefaultParagraphFont"/>
    <style:style style:name="TextbodyChar" style:display-name="Text body Char" style:family="text" style:parent-style-name="StandardChar"/>
    <style:style style:name="Style1Char" style:display-name="Style1 Char" style:family="text" style:parent-style-name="TextbodyChar">
      <style:text-properties style:font-name="Aptos Narrow" style:font-name-complex="Arial" fo:font-weight="bold" style:font-weight-asian="bold" style:font-weight-complex="bold" style:language-complex="he" style:country-complex="I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3"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fo:font-weight="bold" style:font-weight-asian="bold"/>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12LVL2" style:num-suffix="." style:num-list-format-name="NLF2"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3"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3"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3"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3"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3"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3"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format>
    <number:num-list-format style:name="NLF2">
      <number:num-list-label text:level="2"/>
      <number:text>%2%.</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paragraph-properties fo:text-align="center"/>
    </style:style>
    <style:style style:name="T3" style:parent-style-name="DefaultParagraphFont" style:family="text">
      <style:text-properties fo:font-weight="bold" style:font-weight-asian="bold" style:font-weight-complex="bold" style:language-complex="he" style:country-complex="IL"/>
    </style:style>
  </office:automatic-styles>
  <office:master-styles>
    <style:master-page style:name="MP0" style:page-layout-name="PL0">
      <style:header>
        <text:p text:style-name="P2"><text:span text:style-name="T3">CI/CD Module – Lesson Plan Structur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rone Fitussi</dc:creator>
    <meta:creation-date>2026-05-14T21:14:00Z</meta:creation-date>
    <dc:date>2026-05-15T05:49:00Z</dc:date>
    <meta:template xlink:href="Normal.dotm" xlink:type="simple"/>
    <meta:editing-cycles>3</meta:editing-cycles>
    <meta:editing-duration>PT4440S</meta:editing-duration>
    <meta:document-statistic meta:page-count="1" meta:paragraph-count="30" meta:word-count="2565" meta:character-count="15363" meta:row-count="106" meta:non-whitespace-character-count="12828"/>
  </office:meta>
</office:document-meta>
</file>